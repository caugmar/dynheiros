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3-30" calcext:value-type="date">
            <text:p>30/03/2026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5-04" calcext:value-type="date">
            <text:p>04/05/2026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6-08" calcext:value-type="date">
            <text:p>08/06/2026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6-08" calcext:value-type="date">
            <text:p>08/06/2026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6-30" calcext:value-type="date">
            <text:p>30/06/2026</text:p>
          </table:table-cell>
          <table:table-cell table:style-name="ce35" office:value-type="string" calcext:value-type="string">
            <text:p>Mens. 06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3]-[.F13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3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5.805721551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5.8079804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6.126658059</dc:date>
    <dc:language>pt-PT</dc:language>
    <meta:editing-cycles>614</meta:editing-cycles>
    <meta:editing-duration>P3DT2H33M19S</meta:editing-duration>
    <meta:print-date>2019-10-03T14:53:22.911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