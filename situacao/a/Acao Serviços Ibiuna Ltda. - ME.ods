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0-30" calcext:value-type="date">
            <text:p>30/10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1-26" calcext:value-type="date">
            <text:p>26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2-18" calcext:value-type="date">
            <text:p>18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3-30" calcext:value-type="date">
            <text:p>30/03/2026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5-04" calcext:value-type="date">
            <text:p>04/05/2026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Mens. 04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6-08" calcext:value-type="date">
            <text:p>08/06/2026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5-31" calcext:value-type="date">
            <text:p>31/05/2026</text:p>
          </table:table-cell>
          <table:table-cell table:style-name="ce35" office:value-type="string" calcext:value-type="string">
            <text:p>Mens. 05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6-08" calcext:value-type="date">
            <text:p>08/06/2026</text:p>
          </table:table-cell>
          <table:table-cell table:style-name="ce50" table:formula="of:=[.C12]-[.F1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2])" office:value-type="float" office:value="0" calcext:value-type="float">
            <text:p>-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50:46.361541400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50:46.371233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4:59:29</meta:creation-date>
    <dc:date>2026-06-12T15:51:39.068696000</dc:date>
    <dc:language>pt-PT</dc:language>
    <meta:editing-cycles>613</meta:editing-cycles>
    <meta:editing-duration>P3DT2H33M19S</meta:editing-duration>
    <meta:print-date>2019-10-03T14:53:22.911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