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3-30" calcext:value-type="date">
            <text:p>30/03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0]-[.F10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1]-[.F11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1])" office:value-type="float" office:value="200" calcext:value-type="float">
            <text:p>2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1.289199997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1.2913376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11.607102010</dc:date>
    <dc:language>pt-PT</dc:language>
    <meta:editing-cycles>610</meta:editing-cycles>
    <meta:editing-duration>P3DT2H31M55S</meta:editing-duration>
    <meta:print-date>2019-10-03T14:53:22.911000000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