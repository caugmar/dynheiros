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9-11" calcext:value-type="date">
            <text:p>11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2-19" calcext:value-type="date">
            <text:p>19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6-01-23" calcext:value-type="date">
            <text:p>23/01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2-27" calcext:value-type="date">
            <text:p>27/02/2026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4-06" calcext:value-type="date">
            <text:p>06/04/2026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10]-[.F10]" office:value-type="float" office:value="360" calcext:value-type="float">
            <text:p>36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0])" office:value-type="float" office:value="360" calcext:value-type="float">
            <text:p>36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42:55.633678000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42:55.641723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59:29</meta:creation-date>
    <dc:date>2026-04-10T16:43:30.996010400</dc:date>
    <dc:language>pt-PT</dc:language>
    <meta:editing-cycles>610</meta:editing-cycles>
    <meta:editing-duration>P3DT2H57M44S</meta:editing-duration>
    <meta:print-date>2019-10-03T14:53:22.911000000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