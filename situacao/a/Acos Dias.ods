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6"/>
        <table:table-column table:style-name="co3" table:default-cell-style-name="ce40"/>
        <table:table-column table:style-name="co4" table:default-cell-style-name="ce40"/>
        <table:table-column table:style-name="co5" table:default-cell-style-name="ce45"/>
        <table:table-column table:style-name="co6" table:default-cell-style-name="ce40"/>
        <table:table-column table:style-name="co7" table:default-cell-style-name="ce33"/>
        <table:table-column table:style-name="co8" table:default-cell-style-name="ce40"/>
        <table:table-column table:style-name="co9" table:default-cell-style-name="ce45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1"/>
          <table:table-cell table:style-name="ce29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46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29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8-07" calcext:value-type="date">
            <text:p>07/08/2025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9-11" calcext:value-type="date">
            <text:p>11/09/2025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Mens. 09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1-07" calcext:value-type="date">
            <text:p>07/11/2025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Mens. 10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1-07" calcext:value-type="date">
            <text:p>07/11/2025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Mens. 11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2-19" calcext:value-type="date">
            <text:p>19/12/2025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Mens. 12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6-01-23" calcext:value-type="date">
            <text:p>23/01/2026</text:p>
          </table:table-cell>
          <table:table-cell table:style-name="ce50" table:formula="of:=[.C7]-[.F7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Mens. 01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30" office:value-type="date" office:date-value="2026-02-27" calcext:value-type="date">
            <text:p>27/02/2026</text:p>
          </table:table-cell>
          <table:table-cell table:style-name="ce50" table:formula="of:=[.C8]-[.F8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Mens. 02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30" office:value-type="date" office:date-value="2026-04-06" calcext:value-type="date">
            <text:p>06/04/2026</text:p>
          </table:table-cell>
          <table:table-cell table:style-name="ce50" table:formula="of:=[.C9]-[.F9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Mens. 03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30" office:value-type="date" office:date-value="2026-04-29" calcext:value-type="date">
            <text:p>29/04/2026</text:p>
          </table:table-cell>
          <table:table-cell table:style-name="ce50" table:formula="of:=[.C10]-[.F10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4-30" calcext:value-type="date">
            <text:p>30/04/2026</text:p>
          </table:table-cell>
          <table:table-cell table:style-name="ce34" office:value-type="string" calcext:value-type="string">
            <text:p>Mens. 04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30" office:value-type="date" office:date-value="2026-05-19" calcext:value-type="date">
            <text:p>19/05/2026</text:p>
          </table:table-cell>
          <table:table-cell table:style-name="ce50" table:formula="of:=[.C11]-[.F11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5-31" calcext:value-type="date">
            <text:p>31/05/2026</text:p>
          </table:table-cell>
          <table:table-cell table:style-name="ce34" office:value-type="string" calcext:value-type="string">
            <text:p>Mens. 05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2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30"/>
          <table:table-cell table:style-name="ce50" table:formula="of:=[.C12]-[.F12]" office:value-type="float" office:value="360" calcext:value-type="float">
            <text:p>36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6-30" calcext:value-type="date">
            <text:p>30/06/2026</text:p>
          </table:table-cell>
          <table:table-cell table:style-name="ce34" office:value-type="string" calcext:value-type="string">
            <text:p>Mens. 06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2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30"/>
          <table:table-cell table:style-name="ce50" table:formula="of:=[.C13]-[.F13]" office:value-type="float" office:value="360" calcext:value-type="float">
            <text:p>36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13])" office:value-type="float" office:value="720" calcext:value-type="float">
            <text:p>72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48"/>
          <table:table-cell table:style-name="ce39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45.166073340">00:00:00</text:time></text:span><text:span text:style-name="MT2"><text:s/></text:span></text:p>
        </style:region-center>
        <style:region-right>
          <text:p><text:span text:style-name="MT4">Aços Dias - 52.452.582 Carlos Santos Dias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3">Aços Dias - 52.452.582 Carlos Santos Dia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45.16811287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7-01T10:08:45.499830541</dc:date>
    <dc:language>pt-PT</dc:language>
    <meta:editing-cycles>615</meta:editing-cycles>
    <meta:editing-duration>P3DT2H58M35S</meta:editing-duration>
    <meta:print-date>2019-10-03T14:53:22.911000000</meta:print-date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