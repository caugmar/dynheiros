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10 - mens. 10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1-21" calcext:value-type="date">
            <text:p>2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24 - mens. 1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2-19" calcext:value-type="date">
            <text:p>19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38 - mens. 1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1-20" calcext:value-type="date">
            <text:p>20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52 - mens. 01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2-20" calcext:value-type="date">
            <text:p>2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66 - mens. 02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3-20" calcext:value-type="date">
            <text:p>20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NF 13380 - mens. 03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4-20" calcext:value-type="date">
            <text:p>20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NF 13394 - mens. 04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5-20" calcext:value-type="date">
            <text:p>20/05/2026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NF 13408 - mens. 05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6-22" calcext:value-type="date">
            <text:p>22/06/2026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5">00/00/0000</text:date></text:span><text:span text:style-name="MT2"><text:s/>- </text:span><text:span text:style-name="MT2"><text:time style:data-style-name="N2" text:time-value="09:58:58.82175230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09:58:58.828661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5:03:28</meta:creation-date>
    <dc:date>2026-06-25T09:59:57.767535500</dc:date>
    <meta:print-date>2019-09-20T16:21:56.762000000</meta:print-date>
    <dc:language>pt-PT</dc:language>
    <meta:editing-cycles>829</meta:editing-cycles>
    <meta:editing-duration>P3DT19H9M34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