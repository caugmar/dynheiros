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51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 </text:p>
            </table:table-cell>
            <table:table-cell table:style-name="ce30" office:value-type="string" calcext:value-type="string">
              <text:p>R$</text:p>
            </table:table-cell>
            <table:table-cell table:style-name="ce33"/>
            <table:table-cell table:style-name="ce35" office:value-type="string" calcext:value-type="string">
              <text:p>PAGO</text:p>
            </table:table-cell>
            <table:table-cell table:style-name="ce3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9" office:value-type="string" calcext:value-type="string">
              <text:p>SALDO DEVEDOR</text:p>
            </table:table-cell>
            <table:table-cell table:style-name="ce35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68 - mens. 07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8-20" calcext:value-type="date">
            <text:p>20/08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82 - mens. 08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9-22" calcext:value-type="date">
            <text:p>22/09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NF 13296 - mens. 09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0-20" calcext:value-type="date">
            <text:p>20/10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NF 13310 - mens. 10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1-21" calcext:value-type="date">
            <text:p>21/11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NF 13324 - mens. 11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2-19" calcext:value-type="date">
            <text:p>19/1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NF 13338 - mens. 12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6-01-20" calcext:value-type="date">
            <text:p>20/01/2026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NF 13352 - mens. 01/2026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6-02-20" calcext:value-type="date">
            <text:p>20/02/2026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NF 13366 - mens. 02/2026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6-03-20" calcext:value-type="date">
            <text:p>20/03/2026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NF 13380 - mens. 03/2026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6-04-20" calcext:value-type="date">
            <text:p>20/04/2026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4-30" calcext:value-type="date">
            <text:p>30/04/2026</text:p>
          </table:table-cell>
          <table:table-cell table:style-name="ce28" office:value-type="string" calcext:value-type="string">
            <text:p>NF 13394 - mens. 04/2026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1]-[.F11]" office:value-type="float" office:value="1350" calcext:value-type="float">
            <text:p>1.350,00</text:p>
          </table:table-cell>
          <table:table-cell table:style-name="ce41"/>
          <table:table-cell table:style-name="ce42" table:number-columns-repeated="55"/>
        </table:table-row>
        <table:table-row table:style-name="ro1">
          <table:table-cell table:style-name="ce24" table:number-columns-repeated="6"/>
          <table:table-cell table:style-name="ce38" office:value-type="string" calcext:value-type="string">
            <text:p>TOTAL</text:p>
          </table:table-cell>
          <table:table-cell table:style-name="ce30" table:formula="of:=SUM([.H2:.H11])" office:value-type="float" office:value="1350" calcext:value-type="float">
            <text:p>1.350,00</text:p>
          </table:table-cell>
          <table:table-cell table:style-name="ce35"/>
          <table:table-cell table:style-name="ce42" table:number-columns-repeated="55"/>
        </table:table-row>
        <table:table-row table:style-name="ro1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3197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1016556">
          <table:table-cell table:number-columns-repeated="64"/>
        </table:table-row>
        <table:table-row table:style-name="ro3" table:number-rows-repeated="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 table:number-rows-repeated="2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04.971801969">00:00:00</text:time></text:span><text:span text:style-name="MT2"><text:s/></text:span></text:p>
        </style:region-center>
        <style:region-right>
          <text:p><text:span text:style-name="MT4">Agro Comercial Takafuji Ltda.</text:span></text:p>
          <text:p><text:span text:style-name="MT2">Eiji - Tel.: 3241-1359 / 9772-4796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4">Agro Comercial Takafuji Ltda.</text:span></text:p>
          <text:p>sergiosaito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04.97401951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3:28</meta:creation-date>
    <dc:date>2026-04-30T15:57:05.294791459</dc:date>
    <meta:print-date>2019-09-20T16:21:56.762000000</meta:print-date>
    <dc:language>pt-PT</dc:language>
    <meta:editing-cycles>826</meta:editing-cycles>
    <meta:editing-duration>P3DT19H8M</meta:editing-duration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com pagamentos anteriores." VL:creator="Carlos Augusto Marcicano" dc:date-time="2007-02-23T09:38:54"/>
</VL:version-list>
</file>