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2-20" calcext:value-type="date">
            <text:p>2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66 - mens. 02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3-20" calcext:value-type="date">
            <text:p>20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80 - mens. 03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394 - mens. 04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5-20" calcext:value-type="date">
            <text:p>20/05/2026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NF 13408 - mens. 05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6-22" calcext:value-type="date">
            <text:p>22/06/2026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NF 13422 - mens. 06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39.47536233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39.4774941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7-01T10:08:39.820224816</dc:date>
    <meta:print-date>2019-09-20T16:21:56.762000000</meta:print-date>
    <dc:language>pt-PT</dc:language>
    <meta:editing-cycles>830</meta:editing-cycles>
    <meta:editing-duration>P3DT19H9M34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