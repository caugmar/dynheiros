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6-01-09" calcext:value-type="date">
            <text:p>09/01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Mens. 01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2-06" calcext:value-type="date">
            <text:p>06/02/2026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29" office:value-type="string" calcext:value-type="string">
            <text:p>Mens. 02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3-09" calcext:value-type="date">
            <text:p>09/03/2026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4-09" calcext:value-type="date">
            <text:p>09/04/2026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Mens. 04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5-11" calcext:value-type="date">
            <text:p>11/05/2026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29" office:value-type="string" calcext:value-type="string">
            <text:p>Mens. 05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6-11" calcext:value-type="date">
            <text:p>11/06/2026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2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43:53.0898233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43:53.097124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1:56</meta:creation-date>
    <dc:date>2026-06-12T16:44:23.608406300</dc:date>
    <dc:language>pt-PT</dc:language>
    <meta:editing-cycles>648</meta:editing-cycles>
    <meta:editing-duration>P1DT9H39M41S</meta:editing-duration>
    <meta:print-date>2021-06-25T13:43:09.170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