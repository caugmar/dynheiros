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2-06" calcext:value-type="date">
            <text:p>06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Mens. 02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3-09" calcext:value-type="date">
            <text:p>09/03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1]-[.F11]" office:value-type="float" office:value="880" calcext:value-type="float">
            <text:p>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1])" office:value-type="float" office:value="880" calcext:value-type="float">
            <text:p>88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6.29003444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6.2921120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06.610803669</dc:date>
    <dc:language>pt-PT</dc:language>
    <meta:editing-cycles>645</meta:editing-cycles>
    <meta:editing-duration>P1DT9H37M54S</meta:editing-duration>
    <meta:print-date>2021-06-25T13:43:09.170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