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6-01-09" calcext:value-type="date">
            <text:p>09/01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Mens. 01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2-06" calcext:value-type="date">
            <text:p>06/02/2026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29" office:value-type="string" calcext:value-type="string">
            <text:p>Mens. 02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3-09" calcext:value-type="date">
            <text:p>09/03/2026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4-09" calcext:value-type="date">
            <text:p>09/04/2026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Mens. 04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5-11" calcext:value-type="date">
            <text:p>11/05/2026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29" office:value-type="string" calcext:value-type="string">
            <text:p>Mens. 05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6-11" calcext:value-type="date">
            <text:p>11/06/2026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6-30" calcext:value-type="date">
            <text:p>30/06/2026</text:p>
          </table:table-cell>
          <table:table-cell table:style-name="ce29" office:value-type="string" calcext:value-type="string">
            <text:p>Mens. 06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3]-[.F13]" office:value-type="float" office:value="880" calcext:value-type="float">
            <text:p>88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3])" office:value-type="float" office:value="880" calcext:value-type="float">
            <text:p>88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0.783268551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0.7854101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0:08:41.117785902</dc:date>
    <dc:language>pt-PT</dc:language>
    <meta:editing-cycles>649</meta:editing-cycles>
    <meta:editing-duration>P1DT9H39M41S</meta:editing-duration>
    <meta:print-date>2021-06-25T13:43:09.170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