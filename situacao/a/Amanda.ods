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Mens. 01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2-06" calcext:value-type="date">
            <text:p>06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Mens. 02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3-09" calcext:value-type="date">
            <text:p>09/03/2026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29" office:value-type="string" calcext:value-type="string">
            <text:p>Mens. 03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4-09" calcext:value-type="date">
            <text:p>09/04/2026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0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12:36.8866585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12:36.89356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31:56</meta:creation-date>
    <dc:date>2026-04-11T11:13:10.577237300</dc:date>
    <dc:language>pt-PT</dc:language>
    <meta:editing-cycles>644</meta:editing-cycles>
    <meta:editing-duration>P1DT9H37M54S</meta:editing-duration>
    <meta:print-date>2021-06-25T13:43:09.170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