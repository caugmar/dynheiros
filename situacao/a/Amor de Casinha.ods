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0]-[.F10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0])" office:value-type="float" office:value="300" calcext:value-type="float">
            <text:p>30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26.238507164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26.2408017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02T14:26:26.529809614</dc:date>
    <meta:print-date>2019-10-31T18:11:28.685825074</meta:print-date>
    <dc:language>pt-PT</dc:language>
    <meta:editing-cycles>574</meta:editing-cycles>
    <meta:editing-duration>P1DT7H58M8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