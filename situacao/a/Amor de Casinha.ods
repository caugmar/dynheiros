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0]-[.F10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1]-[.F11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1])" office:value-type="float" office:value="600" calcext:value-type="float">
            <text:p>60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6.906658358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6.9089020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30T15:57:07.224069690</dc:date>
    <meta:print-date>2019-10-31T18:11:28.685825074</meta:print-date>
    <dc:language>pt-PT</dc:language>
    <meta:editing-cycles>575</meta:editing-cycles>
    <meta:editing-duration>P1DT7H58M8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