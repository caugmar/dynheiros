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1" office:value-type="string" calcext:value-type="string">
            <text:p>NF 6441 - process. 1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1" office:value-type="string" calcext:value-type="string">
            <text:p>NF 6450 - process. 1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1" office:value-type="string" calcext:value-type="string">
            <text:p>NF 6459 - process. 01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1" office:value-type="string" calcext:value-type="string">
            <text:p>NF 6468 - process. 02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4-01" calcext:value-type="date">
            <text:p>01/04/2026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3-31" calcext:value-type="date">
            <text:p>31/03/2026</text:p>
          </table:table-cell>
          <table:table-cell table:style-name="ce51" office:value-type="string" calcext:value-type="string">
            <text:p>NF 6477 - process. 03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0]-[.F10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0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6.812244582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6.8143516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4-02T14:26:27.097201184</dc:date>
    <meta:print-date>2020-08-07T10:44:15.279000000</meta:print-date>
    <dc:language>pt-PT</dc:language>
    <meta:editing-cycles>583</meta:editing-cycles>
    <meta:editing-duration>P3DT4H32M24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