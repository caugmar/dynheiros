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2-03" calcext:value-type="date">
            <text:p>03/02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3-03" calcext:value-type="date">
            <text:p>03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6" office:value-type="string" calcext:value-type="string">
            <text:p>Mens. 03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4-01" calcext:value-type="date">
            <text:p>01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6" office:value-type="string" calcext:value-type="string">
            <text:p>Mens. 04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1]-[.F11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1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8.159872984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8.1622851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08.530932018</dc:date>
    <dc:language>pt-PT</dc:language>
    <meta:editing-cycles>692</meta:editing-cycles>
    <meta:editing-duration>P4DT6H58M51S</meta:editing-duration>
    <meta:print-date>2023-12-29T11:28:27.023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