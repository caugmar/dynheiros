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8-04" calcext:value-type="date">
            <text:p>04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9-02" calcext:value-type="date">
            <text:p>02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0-01" calcext:value-type="date">
            <text:p>01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1-03" calcext:value-type="date">
            <text:p>03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2-01" calcext:value-type="date">
            <text:p>01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1-02" calcext:value-type="date">
            <text:p>02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1-31" calcext:value-type="date">
            <text:p>31/01/2026</text:p>
          </table:table-cell>
          <table:table-cell table:style-name="ce36" office:value-type="string" calcext:value-type="string">
            <text:p>Mens. 01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2-03" calcext:value-type="date">
            <text:p>03/02/2026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2-28" calcext:value-type="date">
            <text:p>28/02/2026</text:p>
          </table:table-cell>
          <table:table-cell table:style-name="ce36" office:value-type="string" calcext:value-type="string">
            <text:p>Mens. 02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3-03" calcext:value-type="date">
            <text:p>03/03/2026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3-31" calcext:value-type="date">
            <text:p>31/03/2026</text:p>
          </table:table-cell>
          <table:table-cell table:style-name="ce36" office:value-type="string" calcext:value-type="string">
            <text:p>Mens. 03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4-01" calcext:value-type="date">
            <text:p>01/04/2026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4-30" calcext:value-type="date">
            <text:p>30/04/2026</text:p>
          </table:table-cell>
          <table:table-cell table:style-name="ce36" office:value-type="string" calcext:value-type="string">
            <text:p>Mens. 04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5-06" calcext:value-type="date">
            <text:p>06/05/2026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5-31" calcext:value-type="date">
            <text:p>31/05/2026</text:p>
          </table:table-cell>
          <table:table-cell table:style-name="ce36" office:value-type="string" calcext:value-type="string">
            <text:p>Mens. 05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6-01" calcext:value-type="date">
            <text:p>01/06/2026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2])" office:value-type="float" office:value="0" calcext:value-type="float">
            <text:p>-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27:25.169929600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27:25.178995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4:59:29</meta:creation-date>
    <dc:date>2026-06-12T15:27:51.857476200</dc:date>
    <dc:language>pt-PT</dc:language>
    <meta:editing-cycles>695</meta:editing-cycles>
    <meta:editing-duration>P4DT6H59M43S</meta:editing-duration>
    <meta:print-date>2023-12-29T11:28:27.023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