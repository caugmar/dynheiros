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8-04" calcext:value-type="date">
            <text:p>04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9-02" calcext:value-type="date">
            <text:p>02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0-01" calcext:value-type="date">
            <text:p>01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1-03" calcext:value-type="date">
            <text:p>03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2-01" calcext:value-type="date">
            <text:p>01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1-02" calcext:value-type="date">
            <text:p>02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1-31" calcext:value-type="date">
            <text:p>31/01/2026</text:p>
          </table:table-cell>
          <table:table-cell table:style-name="ce36" office:value-type="string" calcext:value-type="string">
            <text:p>Mens. 01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2-03" calcext:value-type="date">
            <text:p>03/02/2026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2-28" calcext:value-type="date">
            <text:p>28/02/2026</text:p>
          </table:table-cell>
          <table:table-cell table:style-name="ce36" office:value-type="string" calcext:value-type="string">
            <text:p>Mens. 02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3-03" calcext:value-type="date">
            <text:p>03/03/2026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3-31" calcext:value-type="date">
            <text:p>31/03/2026</text:p>
          </table:table-cell>
          <table:table-cell table:style-name="ce36" office:value-type="string" calcext:value-type="string">
            <text:p>Mens. 03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4-01" calcext:value-type="date">
            <text:p>01/04/2026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0])" office:value-type="float" office:value="0" calcext:value-type="float">
            <text:p>-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4-02">00/00/0000</text:date></text:span><text:span text:style-name="MT2"><text:s/>- </text:span><text:span text:style-name="MT2"><text:time style:data-style-name="N2" text:time-value="14:28:00.639085512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8:00.6410777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4-02T14:32:38.334188795</dc:date>
    <dc:language>pt-PT</dc:language>
    <meta:editing-cycles>691</meta:editing-cycles>
    <meta:editing-duration>P4DT6H58M51S</meta:editing-duration>
    <meta:print-date>2023-12-29T11:28:27.023000000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