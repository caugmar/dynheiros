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0-10" calcext:value-type="date">
            <text:p>10/10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3-16" calcext:value-type="date">
            <text:p>16/03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0]-[.F10]" office:value-type="float" office:value="550" calcext:value-type="float">
            <text:p>55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1]-[.F11]" office:value-type="float" office:value="550" calcext:value-type="float">
            <text:p>55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1])" office:value-type="float" office:value="1100" calcext:value-type="float">
            <text:p>1.10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8.839235778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8.8415740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09.178862460</dc:date>
    <dc:language>pt-PT</dc:language>
    <meta:editing-cycles>657</meta:editing-cycles>
    <meta:editing-duration>P4DT1H3M19S</meta:editing-duration>
    <meta:print-date>2024-04-03T16:20:46.977000000</meta:print-date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