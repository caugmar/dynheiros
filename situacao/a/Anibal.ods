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3-16" calcext:value-type="date">
            <text:p>16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5-08" calcext:value-type="date">
            <text:p>08/05/2026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5-08" calcext:value-type="date">
            <text:p>08/05/2026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5-31" calcext:value-type="date">
            <text:p>31/05/2026</text:p>
          </table:table-cell>
          <table:table-cell table:style-name="ce32" office:value-type="string" calcext:value-type="string">
            <text:p>Mens. 05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2]-[.F12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2])" office:value-type="float" office:value="550" calcext:value-type="float">
            <text:p>55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05.773106635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05.7752809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6-01T10:21:06.113011560</dc:date>
    <dc:language>pt-PT</dc:language>
    <meta:editing-cycles>659</meta:editing-cycles>
    <meta:editing-duration>P4DT1H4M16S</meta:editing-duration>
    <meta:print-date>2024-04-03T16:20:46.977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