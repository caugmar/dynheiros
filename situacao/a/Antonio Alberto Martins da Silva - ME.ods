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7]-[.F7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8]-[.F8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9]-[.F9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0]-[.F10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0])" office:value-type="float" office:value="1500" calcext:value-type="float">
            <text:p>1.50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8.652128485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8.6547779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26:28.960698630</dc:date>
    <dc:language>pt-PT</dc:language>
    <meta:editing-cycles>642</meta:editing-cycles>
    <meta:editing-duration>P3DT15H25M55S</meta:editing-duration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