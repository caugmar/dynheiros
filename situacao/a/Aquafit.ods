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6-01-07" calcext:value-type="date">
            <text:p>07/01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2-06" calcext:value-type="date">
            <text:p>06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4-07" calcext:value-type="date">
            <text:p>07/04/2026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10])" office:value-type="float" office:value="0" calcext:value-type="float">
            <text:p>-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46:01.8802733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10">00/00/0000</text:date></text:span><text:span text:style-name="MT6"><text:s/>- </text:span><text:span text:style-name="MT6"><text:time style:data-style-name="N2" text:time-value="16:46:01.8877122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46:01.89375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9:29</meta:creation-date>
    <dc:date>2026-04-10T16:46:30.048025000</dc:date>
    <dc:language>pt-PT</dc:language>
    <meta:editing-cycles>669</meta:editing-cycles>
    <meta:editing-duration>P3DT14H48M23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