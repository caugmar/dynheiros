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2]-[.F2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29" office:value-type="string" calcext:value-type="string">
            <text:p>Mens. 04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3]-[.F3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29" office:value-type="string" calcext:value-type="string">
            <text:p>Mens. 05/2026 (A.C.)</text:p>
          </table:table-cell>
          <table:table-cell table:style-name="ce32" office:value-type="float" office:value="450" calcext:value-type="float">
            <text:p>4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4]-[.F4]" office:value-type="float" office:value="450" calcext:value-type="float">
            <text:p>4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4])" office:value-type="float" office:value="1350" calcext:value-type="float">
            <text:p>1.35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01">00/00/0000</text:date></text:span><text:span text:style-name="MT2"><text:s/>- </text:span><text:span text:style-name="MT2"><text:time style:data-style-name="N2" text:time-value="10:21:00.079717340">00:00:00</text:time></text:span><text:span text:style-name="MT2"><text:s/></text:span></text:p>
        </style:region-center>
        <style:region-right>
          <text:p><text:span text:style-name="MT4">AYSU Peixa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YSU Peixari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1">00/00/0000</text:date>, <text:time style:data-style-name="N2" text:time-value="10:21:00.0820959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6-01T10:21:00.344332800</dc:date>
    <dc:language>pt-PT</dc:language>
    <meta:editing-cycles>647</meta:editing-cycles>
    <meta:editing-duration>P1DT9H41M7S</meta:editing-duration>
    <meta:print-date>2021-06-25T13:43:09.170000000</meta:print-date>
    <meta:document-statistic meta:table-count="1" meta:cell-count="28" meta:object-count="0"/>
    <meta:user-defined meta:name="Info 0"/>
    <meta:user-defined meta:name="Info 1"/>
    <meta:user-defined meta:name="Info 2"/>
    <meta:user-defined meta:name="Info 3"/>
  </office:meta>
</office:document-meta>
</file>