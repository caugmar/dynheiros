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2]-[.F2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Mens. 04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3]-[.F3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29" office:value-type="string" calcext:value-type="string">
            <text:p>Mens. 05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4]-[.F4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6-30" calcext:value-type="date">
            <text:p>30/06/2026</text:p>
          </table:table-cell>
          <table:table-cell table:style-name="ce29" office:value-type="string" calcext:value-type="string">
            <text:p>Mens. 06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5]-[.F5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5])" office:value-type="float" office:value="1800" calcext:value-type="float">
            <text:p>1.80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37.512729914">00:00:00</text:time></text:span><text:span text:style-name="MT2"><text:s/></text:span></text:p>
        </style:region-center>
        <style:region-right>
          <text:p><text:span text:style-name="MT4">AYSU Peixa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YSU Peixari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37.5152534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0:08:37.801991234</dc:date>
    <dc:language>pt-PT</dc:language>
    <meta:editing-cycles>648</meta:editing-cycles>
    <meta:editing-duration>P1DT9H41M7S</meta:editing-duration>
    <meta:print-date>2021-06-25T13:43:09.170000000</meta:print-date>
    <meta:document-statistic meta:table-count="1" meta:cell-count="34" meta:object-count="0"/>
    <meta:user-defined meta:name="Info 0"/>
    <meta:user-defined meta:name="Info 1"/>
    <meta:user-defined meta:name="Info 2"/>
    <meta:user-defined meta:name="Info 3"/>
  </office:meta>
</office:document-meta>
</file>