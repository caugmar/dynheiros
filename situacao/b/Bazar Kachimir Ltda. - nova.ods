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wrap" fo:border="0.99pt solid #000000" style:direction="ltr" fo:padding="0cm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1.75" calcext:value-type="float">
            <text:p>31,7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]-[.F2]" office:value-type="float" office:value="498.25" calcext:value-type="float">
            <text:p>498,25</text:p>
          </table:table-cell>
          <table:table-cell table:style-name="ce21" office:value-type="string" calcext:value-type="string">
            <text:p>Desc. mat.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]-[.F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]-[.F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5]-[.F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6]-[.F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7]-[.F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8]-[.F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9]-[.F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0]-[.F1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1]-[.F1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2]-[.F1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3]-[.F1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4]-[.F1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5]-[.F1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6]-[.F1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7]-[.F1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8]-[.F1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19]-[.F1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0]-[.F2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1]-[.F2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2]-[.F2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3]-[.F2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4]-[.F2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5]-[.F2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6]-[.F2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7]-[.F2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8]-[.F2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2" office:value-type="string" calcext:value-type="string">
            <text:p>Mens. 10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2" office:value-type="string" calcext:value-type="string">
            <text:p>Mens. 11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1-28" calcext:value-type="date">
            <text:p>28/11/2025</text:p>
          </table:table-cell>
          <table:table-cell table:style-name="ce65" table:formula="of:=[.C40]-[.F40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2" office:value-type="string" calcext:value-type="string">
            <text:p>Mens. 12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41]-[.F41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2" office:value-type="string" calcext:value-type="string">
            <text:p>Mens. 01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1-29" calcext:value-type="date">
            <text:p>29/01/2026</text:p>
          </table:table-cell>
          <table:table-cell table:style-name="ce65" table:formula="of:=[.C42]-[.F42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2-28" calcext:value-type="date">
            <text:p>28/02/2026</text:p>
          </table:table-cell>
          <table:table-cell table:style-name="ce52" office:value-type="string" calcext:value-type="string">
            <text:p>Mens. 02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2-27" calcext:value-type="date">
            <text:p>27/02/2026</text:p>
          </table:table-cell>
          <table:table-cell table:style-name="ce65" table:formula="of:=[.C43]-[.F43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3-31" calcext:value-type="date">
            <text:p>31/03/2026</text:p>
          </table:table-cell>
          <table:table-cell table:style-name="ce52" office:value-type="string" calcext:value-type="string">
            <text:p>Mens. 03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3-31" calcext:value-type="date">
            <text:p>31/03/2026</text:p>
          </table:table-cell>
          <table:table-cell table:style-name="ce65" table:formula="of:=[.C44]-[.F44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4-30" calcext:value-type="date">
            <text:p>30/04/2026</text:p>
          </table:table-cell>
          <table:table-cell table:style-name="ce52" office:value-type="string" calcext:value-type="string">
            <text:p>Mens. 04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4-30" calcext:value-type="date">
            <text:p>30/04/2026</text:p>
          </table:table-cell>
          <table:table-cell table:style-name="ce65" table:formula="of:=[.C45]-[.F45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45])" office:value-type="float" office:value="20108.25" calcext:value-type="float">
            <text:p>20.108,25</text:p>
          </table:table-cell>
          <table:table-cell table:style-name="ce68"/>
          <table:table-cell table:style-name="ce69" table:number-columns-repeated="247"/>
        </table:table-row>
        <table:table-row table:style-name="ro3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3" table:number-rows-repeated="3353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5-04">00/00/0000</text:date></text:span><text:span text:style-name="MT2"><text:s/>- </text:span><text:span text:style-name="MT2"><text:time style:data-style-name="N2" text:time-value="16:25:04.330479678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6:25:04.3354715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6-05-04T16:27:10.199109835</dc:date>
    <meta:print-date>2025-02-27T11:03:30.394000000</meta:print-date>
    <dc:language>pt-PT</dc:language>
    <meta:editing-cycles>522</meta:editing-cycles>
    <meta:editing-duration>PT18H26M56S</meta:editing-duration>
    <meta:document-statistic meta:table-count="1" meta:cell-count="298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tes de excluir as linhas pagas." VL:creator="" dc:date-time="2026-05-04T16:25:26"/>
</VL:version-list>
</file>