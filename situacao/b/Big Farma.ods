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2-09" calcext:value-type="date">
            <text:p>09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25 - mens. 1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06" calcext:value-type="date">
            <text:p>06/01/2026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39 - mens. 1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26" calcext:value-type="date">
            <text:p>26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53 - mens. 01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2-19" calcext:value-type="date">
            <text:p>1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67 - mens. 02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4-08" calcext:value-type="date">
            <text:p>08/04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81 - mens. 03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0]-[.F10]" office:value-type="float" office:value="730" calcext:value-type="float">
            <text:p>73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13395 - mens. 04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1]-[.F11]" office:value-type="float" office:value="730" calcext:value-type="float">
            <text:p>73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1])" office:value-type="float" office:value="1460" calcext:value-type="float">
            <text:p>1.46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2.786358823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2.7901368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13.107402663</dc:date>
    <dc:language>pt-PT</dc:language>
    <meta:editing-cycles>678</meta:editing-cycles>
    <meta:editing-duration>P3DT15H21M48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