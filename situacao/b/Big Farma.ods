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2-19" calcext:value-type="date">
            <text:p>1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67 - mens. 02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4-08" calcext:value-type="date">
            <text:p>08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1 - mens. 03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5-05" calcext:value-type="date">
            <text:p>05/05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395 - mens. 04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5-05" calcext:value-type="date">
            <text:p>05/05/2026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09 - mens. 05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2])" office:value-type="float" office:value="730" calcext:value-type="float">
            <text:p>73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09.656622198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09.6627937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09.998201475</dc:date>
    <dc:language>pt-PT</dc:language>
    <meta:editing-cycles>680</meta:editing-cycles>
    <meta:editing-duration>P3DT15H22M4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