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06" calcext:value-type="date">
            <text:p>06/01/2026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26" calcext:value-type="date">
            <text:p>26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53 - mens. 01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2-19" calcext:value-type="date">
            <text:p>1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67 - mens. 02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4-08" calcext:value-type="date">
            <text:p>08/04/2026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3-31" calcext:value-type="date">
            <text:p>31/03/2026</text:p>
          </table:table-cell>
          <table:table-cell table:style-name="ce34" office:value-type="string" calcext:value-type="string">
            <text:p>NF 13381 - mens. 03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0]-[.F10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0])" office:value-type="float" office:value="730" calcext:value-type="float">
            <text:p>73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57:48.914580000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57:48.92527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4:59:29</meta:creation-date>
    <dc:date>2026-04-10T16:58:24.674239500</dc:date>
    <dc:language>pt-PT</dc:language>
    <meta:editing-cycles>677</meta:editing-cycles>
    <meta:editing-duration>P3DT15H21M48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