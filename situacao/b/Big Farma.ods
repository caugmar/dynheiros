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83 - mens. 08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9-19" calcext:value-type="date">
            <text:p>19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297 - mens. 09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0-30" calcext:value-type="date">
            <text:p>30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1 - mens. 10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2-09" calcext:value-type="date">
            <text:p>09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25 - mens. 1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06" calcext:value-type="date">
            <text:p>06/01/2026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39 - mens. 1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26" calcext:value-type="date">
            <text:p>26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53 - mens. 01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30" calcext:value-type="float">
            <text:p>730,00</text:p>
          </table:table-cell>
          <table:table-cell table:style-name="ce29" office:value-type="date" office:date-value="2026-02-19" calcext:value-type="date">
            <text:p>1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13367 - mens. 02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30" calcext:value-type="float">
            <text:p>730,00</text:p>
          </table:table-cell>
          <table:table-cell table:style-name="ce29" office:value-type="date" office:date-value="2026-04-08" calcext:value-type="date">
            <text:p>08/04/2026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13381 - mens. 03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30" calcext:value-type="float">
            <text:p>730,00</text:p>
          </table:table-cell>
          <table:table-cell table:style-name="ce29" office:value-type="date" office:date-value="2026-05-05" calcext:value-type="date">
            <text:p>05/05/2026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NF 13395 - mens. 04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30" calcext:value-type="float">
            <text:p>730,00</text:p>
          </table:table-cell>
          <table:table-cell table:style-name="ce29" office:value-type="date" office:date-value="2026-05-05" calcext:value-type="date">
            <text:p>05/05/2026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NF 13409 - mens. 05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2]-[.F12]" office:value-type="float" office:value="730" calcext:value-type="float">
            <text:p>73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6-30" calcext:value-type="date">
            <text:p>30/06/2026</text:p>
          </table:table-cell>
          <table:table-cell table:style-name="ce34" office:value-type="string" calcext:value-type="string">
            <text:p>NF 13423 - mens. 06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3]-[.F13]" office:value-type="float" office:value="730" calcext:value-type="float">
            <text:p>73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3])" office:value-type="float" office:value="1460" calcext:value-type="float">
            <text:p>1.46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7.162015364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7.1658660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7-01T10:08:47.463753600</dc:date>
    <dc:language>pt-PT</dc:language>
    <meta:editing-cycles>681</meta:editing-cycles>
    <meta:editing-duration>P3DT15H22M4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