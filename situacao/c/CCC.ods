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2pt" style:font-name-asian="Arial" style:font-size-asian="12pt" style:font-name-complex="Arial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41" office:value-type="string" calcext:value-type="string">
            <text:p>Mens. 01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3-20" calcext:value-type="date">
            <text:p>20/03/2026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41" office:value-type="string" calcext:value-type="string">
            <text:p>Mens. 02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3-20" calcext:value-type="date">
            <text:p>20/03/2026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41" office:value-type="string" calcext:value-type="string">
            <text:p>Mens. 03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4-29" calcext:value-type="date">
            <text:p>29/04/2026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4-30" calcext:value-type="date">
            <text:p>30/04/2026</text:p>
          </table:table-cell>
          <table:table-cell table:style-name="ce41" office:value-type="string" calcext:value-type="string">
            <text:p>Mens. 04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5]-[.F5]" office:value-type="float" office:value="350" calcext:value-type="float">
            <text:p>35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5])" office:value-type="float" office:value="350" calcext:value-type="float">
            <text:p>35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5">
          <table:table-cell table:number-columns-repeated="64"/>
        </table:table-row>
        <table:table-row table:style-name="ro5" table:number-rows-repeated="1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13.4019754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13.403000001">00:00:00</text:time></text:span><text:span text:style-name="MT2"><text:s/></text:span></text:p>
        </style:region-center>
        <style:region-right>
          <text:p><text:span text:style-name="MT3">CCC Materiais Elétricos e Automação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CC Materiais Elétricos e Automação Ltda.</text:span></text:p>
          <text:p><text:span text:style-name="MT6"/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6-04-30T15:57:14.068966105</dc:date>
    <meta:print-date>2021-02-03T10:36:46.531338502</meta:print-date>
    <meta:editing-cycles>734</meta:editing-cycles>
    <meta:editing-duration>PT16H56M37S</meta:editing-duration>
    <meta:document-statistic meta:table-count="1" meta:cell-count="37" meta:object-count="0"/>
    <meta:user-defined meta:name="Info 0"/>
    <meta:user-defined meta:name="Info 1"/>
    <meta:user-defined meta:name="Info 2"/>
    <meta:user-defined meta:name="Info 3"/>
  </office:meta>
</office:document-meta>
</file>