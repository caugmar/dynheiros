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3-20" calcext:value-type="date">
            <text:p>20/03/2026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4-29" calcext:value-type="date">
            <text:p>29/04/2026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5-27" calcext:value-type="date">
            <text:p>27/05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41" office:value-type="string" calcext:value-type="string">
            <text:p>Mens. 05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350" calcext:value-type="float">
            <text:p>350,00</text:p>
          </table:table-cell>
          <table:table-cell table:style-name="ce36" office:value-type="date" office:date-value="2026-06-24" calcext:value-type="date">
            <text:p>24/06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6])" office:value-type="float" office:value="0" calcext:value-type="float">
            <text:p>-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09:53:34.99631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09:53:34.998111900">00:00:00</text:time></text:span><text:span text:style-name="MT2"><text:s/></text:span></text:p>
        </style:region-center>
        <style:region-right>
          <text:p><text:span text:style-name="MT3">CCC Materiais Elétricos e Automação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CC Materiais Elétricos e Automação Ltda.</text:span></text:p>
          <text:p><text:span text:style-name="MT6"/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4:51:54Z</meta:creation-date>
    <dc:date>2026-06-25T09:56:04.737540800</dc:date>
    <meta:print-date>2021-02-03T10:36:46.531338502</meta:print-date>
    <meta:editing-cycles>737</meta:editing-cycles>
    <meta:editing-duration>PT16H59M31S</meta:editing-duration>
    <meta:document-statistic meta:table-count="1" meta:cell-count="45" meta:object-count="0"/>
    <meta:user-defined meta:name="Info 0"/>
    <meta:user-defined meta:name="Info 1"/>
    <meta:user-defined meta:name="Info 2"/>
    <meta:user-defined meta:name="Info 3"/>
  </office:meta>
</office:document-meta>
</file>