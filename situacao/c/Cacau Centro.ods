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Processo de abertura</text:p>
          </table:table-cell>
          <table:table-cell table:style-name="ce72" office:value-type="float" office:value="1000" calcext:value-type="float">
            <text:p>1.00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1000" calcext:value-type="float">
            <text:p>1.00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3"/>
          <table:table-cell table:style-name="ce84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7" office:value-type="string" calcext:value-type="string">
            <text:p>Mens. 04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3]-[.F3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3])" office:value-type="float" office:value="440" calcext:value-type="float">
            <text:p>44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4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4.9659943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4.967090626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entro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entro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4-30T15:57:15.260416820</dc:date>
    <meta:editing-cycles>690</meta:editing-cycles>
    <meta:editing-duration>PT5H15M11S</meta:editing-duration>
    <meta:document-statistic meta:table-count="1" meta:cell-count="23" meta:object-count="0"/>
    <meta:user-defined meta:name="Info 0"/>
    <meta:user-defined meta:name="Info 1"/>
    <meta:user-defined meta:name="Info 2"/>
    <meta:user-defined meta:name="Info 3"/>
  </office:meta>
</office:document-meta>
</file>