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Arial21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2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8" style:family="table-cell" style:parent-style-name="Default" style:data-style-name="N0"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62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9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0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1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2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3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4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style:font-name-asian="Arial" style:font-size-asian="12pt" style:font-name-complex="Arial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2" fo:font-size="8pt" style:font-name-asian="Arial" style:font-size-asian="8pt" style:font-name-complex="Arial" style:font-size-complex="8pt"/>
    </style:style>
    <style:style style:name="ce8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2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4" office:value-type="string" calcext:value-type="string">
            <text:p>NF - SERV. PROD.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75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5" office:value-type="string" calcext:value-type="string">
            <text:p>OBS.:</text:p>
          </table:table-cell>
          <table:table-cell table:style-name="ce60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08-20" calcext:value-type="date">
            <text:p>20/08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1-09" calcext:value-type="date">
            <text:p>09/01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320" calcext:value-type="float">
            <text:p>3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540" calcext:value-type="float">
            <text:p>5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4-09" calcext:value-type="date">
            <text:p>09/04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5" office:value-type="string" calcext:value-type="string">
            <text:p>Mens. 03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6-09" calcext:value-type="date">
            <text:p>09/06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5" office:value-type="string" calcext:value-type="string">
            <text:p>Mens. 04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40" calcext:value-type="float">
            <text:p>440,00</text:p>
          </table:table-cell>
          <table:table-cell table:style-name="ce56" office:value-type="date" office:date-value="2026-06-09" calcext:value-type="date">
            <text:p>09/06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5-31" calcext:value-type="date">
            <text:p>31/05/2026</text:p>
          </table:table-cell>
          <table:table-cell table:style-name="ce65" office:value-type="string" calcext:value-type="string">
            <text:p>Mens. 05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12]-[.F12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7"/>
          <table:table-cell table:style-name="ce66"/>
          <table:table-cell table:style-name="ce71"/>
          <table:table-cell table:style-name="ce62" table:number-columns-repeated="3"/>
          <table:table-cell table:style-name="ce78" office:value-type="string" calcext:value-type="string">
            <text:p>TOTAL</text:p>
          </table:table-cell>
          <table:table-cell table:style-name="ce69" table:formula="of:=SUM([.H2:.H12])" office:value-type="float" office:value="490" calcext:value-type="float">
            <text:p>490,00</text:p>
          </table:table-cell>
          <table:table-cell table:style-name="ce75"/>
          <table:table-cell table:style-name="ce60" table:number-columns-repeated="55"/>
        </table:table-row>
        <table:table-row table:style-name="ro3">
          <table:table-cell table:style-name="ce58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number-columns-repeated="3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style-name="ce60"/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5">
          <table:table-cell table:style-name="ce61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">
          <table:table-cell table:style-name="ce62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2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3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1966">
          <table:table-cell table:style-name="ce63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Arial21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" fo:font-size="16pt" style:text-underline-style="solid" style:text-underline-type="double" style:text-underline-width="auto" style:text-underline-color="font-color" fo:font-weight="bold" style:font-name-asian="Arial1" style:font-size-asian="16pt" style:font-weight-asian="bold" style:font-name-complex="Arial1" style:font-size-complex="16pt" style:font-weight-complex="bold"/>
    </style:style>
    <style:style style:name="MT2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MT3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37:50.197961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37:50.199784500">00:00:00</text:time></text:span><text:span text:style-name="MT2"><text:s/></text:span></text:p>
        </style:region-center>
        <style:region-right>
          <text:p><text:span text:style-name="MT3">Cacau Chocolateria Super Ibiúna Ltda.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 Super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2:31Z</meta:creation-date>
    <dc:date>2026-06-12T16:38:19.280439100</dc:date>
    <meta:editing-cycles>684</meta:editing-cycles>
    <meta:editing-duration>PT5H8M23S</meta:editing-duration>
    <meta:print-date>2021-02-03T09:46:26.067873642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