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 style:font-family-generic="swiss" style:font-pitch="variable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57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6pt" style:font-name-asian="Arial2" style:font-size-asian="16pt" style:font-name-complex="Arial2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7" office:value-type="string" calcext:value-type="string">
            <text:p>Mens. 07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08-20" calcext:value-type="date">
            <text:p>20/08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7" office:value-type="string" calcext:value-type="string">
            <text:p>Mens. 08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7" office:value-type="string" calcext:value-type="string">
            <text:p>Mens. 09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7" office:value-type="string" calcext:value-type="string">
            <text:p>Mens. 10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1-09" calcext:value-type="date">
            <text:p>09/01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7" office:value-type="string" calcext:value-type="string">
            <text:p>Mens. 11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7" office:value-type="string" calcext:value-type="string">
            <text:p>Mens. 12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7" office:value-type="string" calcext:value-type="string">
            <text:p>Mens. 01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Mens. 02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7" office:value-type="string" calcext:value-type="string">
            <text:p>Mens. 03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6-09" calcext:value-type="date">
            <text:p>09/06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4-30" calcext:value-type="date">
            <text:p>30/04/2026</text:p>
          </table:table-cell>
          <table:table-cell table:style-name="ce67" office:value-type="string" calcext:value-type="string">
            <text:p>Mens. 04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6-09" calcext:value-type="date">
            <text:p>09/06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5-31" calcext:value-type="date">
            <text:p>31/05/2026</text:p>
          </table:table-cell>
          <table:table-cell table:style-name="ce67" office:value-type="string" calcext:value-type="string">
            <text:p>Mens. 05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12]-[.F12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2">
          <table:table-cell table:style-name="ce55" office:value-type="date" office:date-value="2026-06-30" calcext:value-type="date">
            <text:p>30/06/2026</text:p>
          </table:table-cell>
          <table:table-cell table:style-name="ce67" office:value-type="string" calcext:value-type="string">
            <text:p>Mens. 06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13]-[.F13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13])" office:value-type="float" office:value="880" calcext:value-type="float">
            <text:p>880,00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 style:font-family-generic="swiss" style:font-pitch="variable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9.9546879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9.955832334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7-01T10:08:50.301525275</dc:date>
    <meta:editing-cycles>692</meta:editing-cycles>
    <meta:editing-duration>PT5H11M58S</meta:editing-duration>
    <meta:print-date>2026-03-03T15:04:27.625214454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