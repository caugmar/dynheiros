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Arial21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0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3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3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7" office:value-type="string" calcext:value-type="string">
            <text:p>Mens. 07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08-20" calcext:value-type="date">
            <text:p>20/08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7" office:value-type="string" calcext:value-type="string">
            <text:p>Mens. 08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7" office:value-type="string" calcext:value-type="string">
            <text:p>Mens. 09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7" office:value-type="string" calcext:value-type="string">
            <text:p>Mens. 10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1-09" calcext:value-type="date">
            <text:p>09/01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7" office:value-type="string" calcext:value-type="string">
            <text:p>Mens. 11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7" office:value-type="string" calcext:value-type="string">
            <text:p>Mens. 12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7" office:value-type="string" calcext:value-type="string">
            <text:p>Mens. 01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Mens. 02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7" office:value-type="string" calcext:value-type="string">
            <text:p>Mens. 03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6-09" calcext:value-type="date">
            <text:p>09/06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7" office:value-type="string" calcext:value-type="string">
            <text:p>Mens. 04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6-09" calcext:value-type="date">
            <text:p>09/06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5-31" calcext:value-type="date">
            <text:p>31/05/2026</text:p>
          </table:table-cell>
          <table:table-cell table:style-name="ce67" office:value-type="string" calcext:value-type="string">
            <text:p>Mens. 05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12]-[.F12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12])" office:value-type="float" office:value="440" calcext:value-type="float">
            <text:p>44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Arial21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" fo:font-size="16pt" style:text-underline-style="solid" style:text-underline-type="double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M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MT3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bold" style:font-name-complex="Arial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39:37.69686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39:37.6988276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2:31Z</meta:creation-date>
    <dc:date>2026-06-12T16:41:13.986198700</dc:date>
    <meta:editing-cycles>691</meta:editing-cycles>
    <meta:editing-duration>PT5H11M58S</meta:editing-duration>
    <meta:print-date>2026-03-03T15:04:27.625214454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