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2-03" calcext:value-type="date">
            <text:p>03/02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3-03" calcext:value-type="date">
            <text:p>03/03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4-01" calcext:value-type="date">
            <text:p>01/04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1]-[.F11]" office:value-type="float" office:value="650" calcext:value-type="float">
            <text:p>65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1])" office:value-type="float" office:value="650" calcext:value-type="float">
            <text:p>65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7.527588413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7.5297465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30T15:57:17.838343331</dc:date>
    <meta:print-date>2025-01-02T18:05:13.032000000</meta:print-date>
    <dc:language>pt-PT</dc:language>
    <meta:editing-cycles>594</meta:editing-cycles>
    <meta:editing-duration>P1DT8H22M31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