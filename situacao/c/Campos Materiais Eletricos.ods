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2-03" calcext:value-type="date">
            <text:p>03/02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3-03" calcext:value-type="date">
            <text:p>03/03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4-01" calcext:value-type="date">
            <text:p>01/04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5-06" calcext:value-type="date">
            <text:p>06/05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6-01" calcext:value-type="date">
            <text:p>01/06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29:20.94734240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29:20.95439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5:02:04</meta:creation-date>
    <dc:date>2026-06-12T15:30:40.251071900</dc:date>
    <meta:print-date>2025-01-02T18:05:13.032000000</meta:print-date>
    <dc:language>pt-PT</dc:language>
    <meta:editing-cycles>597</meta:editing-cycles>
    <meta:editing-duration>P1DT8H25M4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