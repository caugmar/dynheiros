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1-03" calcext:value-type="date">
            <text:p>03/11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1-02" calcext:value-type="date">
            <text:p>02/01/2026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2-03" calcext:value-type="date">
            <text:p>03/02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3-03" calcext:value-type="date">
            <text:p>03/03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4-01" calcext:value-type="date">
            <text:p>01/04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5-06" calcext:value-type="date">
            <text:p>06/05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5-31" calcext:value-type="date">
            <text:p>31/05/2026</text:p>
          </table:table-cell>
          <table:table-cell table:style-name="ce28" office:value-type="string" calcext:value-type="string">
            <text:p>Mens. 05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6-01" calcext:value-type="date">
            <text:p>01/06/2026</text:p>
          </table:table-cell>
          <table:table-cell table:style-name="ce40"/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6-30" calcext:value-type="date">
            <text:p>30/06/2026</text:p>
          </table:table-cell>
          <table:table-cell table:style-name="ce28" office:value-type="string" calcext:value-type="string">
            <text:p>Mens. 06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3]-[.F13]" office:value-type="float" office:value="650" calcext:value-type="float">
            <text:p>65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650" calcext:value-type="float">
            <text:p>65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51.915057972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51.9172488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7-01T10:08:52.222494878</dc:date>
    <meta:print-date>2025-01-02T18:05:13.032000000</meta:print-date>
    <dc:language>pt-PT</dc:language>
    <meta:editing-cycles>598</meta:editing-cycles>
    <meta:editing-duration>P1DT8H25M4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