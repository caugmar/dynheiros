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1-02" calcext:value-type="date">
            <text:p>02/01/2026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2-03" calcext:value-type="date">
            <text:p>03/02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3-03" calcext:value-type="date">
            <text:p>03/03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4-01" calcext:value-type="date">
            <text:p>01/04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0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33:48.545783356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33:48.5489635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02T14:36:23.815991310</dc:date>
    <meta:print-date>2025-01-02T18:05:13.032000000</meta:print-date>
    <dc:language>pt-PT</dc:language>
    <meta:editing-cycles>593</meta:editing-cycles>
    <meta:editing-duration>P1DT8H22M31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