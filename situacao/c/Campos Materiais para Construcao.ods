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0]-[.F3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1]-[.F3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2]-[.F3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9" office:value-type="string" calcext:value-type="string">
            <text:p>Mens. 05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3]-[.F3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33])" office:value-type="float" office:value="3650" calcext:value-type="float">
            <text:p>3.6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4:58:45.685846019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58:45.6878057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6-01T15:21:26.621854760</dc:date>
    <meta:print-date>2019-10-31T18:04:07.913029257</meta:print-date>
    <dc:language>pt-PT</dc:language>
    <meta:editing-cycles>566</meta:editing-cycles>
    <meta:editing-duration>P1DT7H55M33S</meta:editing-duration>
    <meta:document-statistic meta:table-count="1" meta:cell-count="211" meta:object-count="0"/>
    <meta:user-defined meta:name="Info 0"/>
    <meta:user-defined meta:name="Info 1"/>
    <meta:user-defined meta:name="Info 2"/>
    <meta:user-defined meta:name="Info 3"/>
  </office:meta>
</office:document-meta>
</file>