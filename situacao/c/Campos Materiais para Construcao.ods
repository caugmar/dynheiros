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4]-[.F2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5]-[.F2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6]-[.F2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7]-[.F2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8]-[.F2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9]-[.F2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9" office:value-type="string" calcext:value-type="string">
            <text:p>Mens. 02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0]-[.F3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9" office:value-type="string" calcext:value-type="string">
            <text:p>Mens. 03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1]-[.F3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31])" office:value-type="float" office:value="3350" calcext:value-type="float">
            <text:p>3.35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35.448761629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35.4508915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02T14:26:35.766140723</dc:date>
    <meta:print-date>2019-10-31T18:04:07.913029257</meta:print-date>
    <dc:language>pt-PT</dc:language>
    <meta:editing-cycles>563</meta:editing-cycles>
    <meta:editing-duration>P1DT7H32M52S</meta:editing-duration>
    <meta:document-statistic meta:table-count="1" meta:cell-count="199" meta:object-count="0"/>
    <meta:user-defined meta:name="Info 0"/>
    <meta:user-defined meta:name="Info 1"/>
    <meta:user-defined meta:name="Info 2"/>
    <meta:user-defined meta:name="Info 3"/>
  </office:meta>
</office:document-meta>
</file>