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6442 - process. 1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2-10" calcext:value-type="date">
            <text:p>10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6451 - process. 1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6460 - process. 01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2-10" calcext:value-type="date">
            <text:p>1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6469 - process. 02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3-09" calcext:value-type="date">
            <text:p>09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6478 - process. 03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4-10" calcext:value-type="date">
            <text:p>10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4-30" calcext:value-type="date">
            <text:p>30/04/2026</text:p>
          </table:table-cell>
          <table:table-cell table:style-name="ce34" office:value-type="string" calcext:value-type="string">
            <text:p>NF 6487 - process. 04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5-08" calcext:value-type="date">
            <text:p>08/05/2026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5-31" calcext:value-type="date">
            <text:p>31/05/2026</text:p>
          </table:table-cell>
          <table:table-cell table:style-name="ce34" office:value-type="string" calcext:value-type="string">
            <text:p>NF 6496 - process. 05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6-11" calcext:value-type="date">
            <text:p>11/06/2026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6-30" calcext:value-type="date">
            <text:p>30/06/2026</text:p>
          </table:table-cell>
          <table:table-cell table:style-name="ce34" office:value-type="string" calcext:value-type="string">
            <text:p>NF 6505 - process. 06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13]-[.F13]" office:value-type="float" office:value="310" calcext:value-type="float">
            <text:p>31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3])" office:value-type="float" office:value="310" calcext:value-type="float">
            <text:p>31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2.51992343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2.5221580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7-01T10:08:52.837393836</dc:date>
    <meta:print-date>2020-10-05T16:03:21.998000000</meta:print-date>
    <dc:language>pt-PT</dc:language>
    <meta:editing-cycles>588</meta:editing-cycles>
    <meta:editing-duration>P1DT5H8M15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