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2-06" calcext:value-type="date">
            <text:p>06/02/2026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NF 6470 - process. 02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3-06" calcext:value-type="date">
            <text:p>06/03/2026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NF 6479 - process. 03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4-07" calcext:value-type="date">
            <text:p>07/04/2026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NF 6488 - process. 04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5-07" calcext:value-type="date">
            <text:p>07/05/2026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5-31" calcext:value-type="date">
            <text:p>31/05/2026</text:p>
          </table:table-cell>
          <table:table-cell table:style-name="ce21" office:value-type="string" calcext:value-type="string">
            <text:p>NF 6497 - process. 05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6-08" calcext:value-type="date">
            <text:p>08/06/2026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6-30" calcext:value-type="date">
            <text:p>30/06/2026</text:p>
          </table:table-cell>
          <table:table-cell table:style-name="ce21" office:value-type="string" calcext:value-type="string">
            <text:p>NF 6506 - process. 06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3]-[.F13]" office:value-type="float" office:value="350" calcext:value-type="float">
            <text:p>35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3])" office:value-type="float" office:value="350" calcext:value-type="float">
            <text:p>35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date style:data-style-name="N2" text:date-value="2026-07-01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3.7696616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7-01T10:08:54.070265463</dc:date>
    <dc:language>pt-PT</dc:language>
    <meta:editing-cycles>704</meta:editing-cycles>
    <meta:editing-duration>P2DT3H11M39S</meta:editing-duration>
    <meta:print-date>2019-04-02T15:32:31.034658233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