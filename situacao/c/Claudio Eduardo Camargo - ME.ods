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0]-[.F10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1]-[.F11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1])" office:value-type="float" office:value="160" calcext:value-type="float">
            <text:p>16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0.0718958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0.072937852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4-30T15:57:20.425120403</dc:date>
    <meta:print-date>2021-02-03T10:36:46.531338502</meta:print-date>
    <meta:editing-cycles>730</meta:editing-cycles>
    <meta:editing-duration>PT16H52M53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