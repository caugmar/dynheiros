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41" office:value-type="string" calcext:value-type="string">
            <text:p>Mens. 08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41" office:value-type="string" calcext:value-type="string">
            <text:p>Mens. 09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41" office:value-type="string" calcext:value-type="string">
            <text:p>Mens. 10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41" office:value-type="string" calcext:value-type="string">
            <text:p>Mens. 11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41" office:value-type="string" calcext:value-type="string">
            <text:p>Mens. 12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41" office:value-type="string" calcext:value-type="string">
            <text:p>Mens. 01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4-09" calcext:value-type="date">
            <text:p>09/04/2026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41" office:value-type="string" calcext:value-type="string">
            <text:p>Mens. 02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4-09" calcext:value-type="date">
            <text:p>09/04/2026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41" office:value-type="string" calcext:value-type="string">
            <text:p>Mens. 03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0]-[.F10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10])" office:value-type="float" office:value="80" calcext:value-type="float">
            <text:p>8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5">
          <table:table-cell table:number-columns-repeated="64"/>
        </table:table-row>
        <table:table-row table:style-name="ro5" table:number-rows-repeated="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1:44:17.246639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1:44:17.248531500">00:00:00</text:time></text:span><text:span text:style-name="MT2"><text:s/></text:span></text:p>
        </style:region-center>
        <style:region-right>
          <text:p><text:span text:style-name="MT3">Cláudio Eduardo Camargo - ME</text:span></text:p>
          <text:p><text:span text:style-name="MT2">Tel.: 3248-3550 /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áudio Eduardo Camargo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4:51:54Z</meta:creation-date>
    <dc:date>2026-04-11T11:45:09.463554000</dc:date>
    <meta:print-date>2021-02-03T10:36:46.531338502</meta:print-date>
    <meta:editing-cycles>729</meta:editing-cycles>
    <meta:editing-duration>PT16H52M53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