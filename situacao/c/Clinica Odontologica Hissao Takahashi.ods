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70" calcext:value-type="float">
            <text:p>270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2">
            <text:p>PG – 405,00</text:p>
            <text:p>270,00 – 01/2026</text:p>
            <text:p>135,00 – 02/2026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" calcext:value-type="float">
            <text:p>135,00</text:p>
          </table:table-cell>
          <table:table-cell table:style-name="ce23" office:value-type="date" office:date-value="2026-04-10" calcext:value-type="date">
            <text:p>10/04/2026</text:p>
          </table:table-cell>
          <table:table-cell table:style-name="ce40" table:formula="of:=[.C9]-[.F9]" office:value-type="float" office:value="135" calcext:value-type="float">
            <text:p>135,00</text:p>
          </table:table-cell>
          <table:covered-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0]-[.F10]" office:value-type="float" office:value="270" calcext:value-type="float">
            <text:p>2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0])" office:value-type="float" office:value="405" calcext:value-type="float">
            <text:p>405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0:48:32.562217000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0:48:32.569071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5:02:04</meta:creation-date>
    <dc:date>2026-04-11T10:50:24.780021100</dc:date>
    <meta:print-date>2019-10-31T18:04:07.913029257</meta:print-date>
    <dc:language>pt-PT</dc:language>
    <meta:editing-cycles>568</meta:editing-cycles>
    <meta:editing-duration>P1DT9H11M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