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1-17" calcext:value-type="date">
            <text:p>17/1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2-05" calcext:value-type="date">
            <text:p>05/1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70" calcext:value-type="float">
            <text:p>270,00</text:p>
          </table:table-cell>
          <table:table-cell table:style-name="ce23" office:value-type="date" office:date-value="2026-04-10" calcext:value-type="date">
            <text:p>10/04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21" office:value-type="string" calcext:value-type="string" table:number-columns-spanned="1" table:number-rows-spanned="2">
            <text:p>PG – 405,00</text:p>
            <text:p>270,00 – 01/2026</text:p>
            <text:p>135,00 – 02/2026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" calcext:value-type="float">
            <text:p>135,00</text:p>
          </table:table-cell>
          <table:table-cell table:style-name="ce23" office:value-type="date" office:date-value="2026-04-10" calcext:value-type="date">
            <text:p>10/04/2026</text:p>
          </table:table-cell>
          <table:table-cell table:style-name="ce40" table:formula="of:=[.C9]-[.F9]" office:value-type="float" office:value="135" calcext:value-type="float">
            <text:p>135,00</text:p>
          </table:table-cell>
          <table:covered-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405" calcext:value-type="float">
            <text:p>405,00</text:p>
          </table:table-cell>
          <table:table-cell table:style-name="ce23" office:value-type="date" office:date-value="2026-04-20" calcext:value-type="date">
            <text:p>20/04/2026</text:p>
          </table:table-cell>
          <table:table-cell table:style-name="ce40" table:formula="of:=[.C10]-[.F10]" office:value-type="float" office:value="-135" calcext:value-type="float">
            <text:p>(135,00)</text:p>
          </table:table-cell>
          <table:table-cell table:style-name="ce43" office:value-type="string" calcext:value-type="string">
            <text:p>PG – 405,00</text:p>
            <text:p>135,00 – 02/2026</text:p>
            <text:p>270,00 – 03/2026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1]-[.F11]" office:value-type="float" office:value="270" calcext:value-type="float">
            <text:p>270,00</text:p>
          </table:table-cell>
          <table:table-cell table:style-name="ce43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1])" office:value-type="float" office:value="270" calcext:value-type="float">
            <text:p>27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1.292846669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1.2950284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30T15:57:21.601346435</dc:date>
    <meta:print-date>2019-10-31T18:04:07.913029257</meta:print-date>
    <dc:language>pt-PT</dc:language>
    <meta:editing-cycles>570</meta:editing-cycles>
    <meta:editing-duration>P1DT9H12M15S</meta:editing-duration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