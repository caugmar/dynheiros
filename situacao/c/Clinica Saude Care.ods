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2-02" calcext:value-type="date">
            <text:p>02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3-01" calcext:value-type="date">
            <text:p>01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4-02" calcext:value-type="date">
            <text:p>02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5-04" calcext:value-type="date">
            <text:p>04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6-01" calcext:value-type="date">
            <text:p>01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Mens. 06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170" calcext:value-type="float">
            <text:p>1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4.95268555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4.95499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8:55.298580272</dc:date>
    <meta:print-date>2019-10-31T18:04:07.913029257</meta:print-date>
    <dc:language>pt-PT</dc:language>
    <meta:editing-cycles>568</meta:editing-cycles>
    <meta:editing-duration>P1DT8H32M54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