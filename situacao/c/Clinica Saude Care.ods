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2-02" calcext:value-type="date">
            <text:p>02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9]-[.F9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28" office:value-type="string" calcext:value-type="string">
            <text:p>Mens. 03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0]-[.F10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4-30" calcext:value-type="date">
            <text:p>30/04/2026</text:p>
          </table:table-cell>
          <table:table-cell table:style-name="ce28" office:value-type="string" calcext:value-type="string">
            <text:p>Mens. 04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1]-[.F11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1])" office:value-type="float" office:value="510" calcext:value-type="float">
            <text:p>51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20.724030376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20.7264808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4-30T15:57:21.003161768</dc:date>
    <meta:print-date>2019-10-31T18:04:07.913029257</meta:print-date>
    <dc:language>pt-PT</dc:language>
    <meta:editing-cycles>564</meta:editing-cycles>
    <meta:editing-duration>P1DT8H31M52S</meta:editing-duration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