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2-02" calcext:value-type="date">
            <text:p>02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3-01" calcext:value-type="date">
            <text:p>01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4-02" calcext:value-type="date">
            <text:p>02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5-04" calcext:value-type="date">
            <text:p>04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6-01" calcext:value-type="date">
            <text:p>01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30">00/00/0000</text:date></text:span><text:span text:style-name="MT2"><text:s/>- </text:span><text:span text:style-name="MT2"><text:time style:data-style-name="N2" text:time-value="14:30:39.1533160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4:30:39.16055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5:02:04</meta:creation-date>
    <dc:date>2026-06-30T14:31:02.861888100</dc:date>
    <meta:print-date>2019-10-31T18:04:07.913029257</meta:print-date>
    <dc:language>pt-PT</dc:language>
    <meta:editing-cycles>567</meta:editing-cycles>
    <meta:editing-duration>P1DT8H32M54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