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1-01" calcext:value-type="date">
            <text:p>0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6-01-04" calcext:value-type="date">
            <text:p>04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2-02" calcext:value-type="date">
            <text:p>02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9]-[.F9]" office:value-type="float" office:value="170" calcext:value-type="float">
            <text:p>1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0]-[.F10]" office:value-type="float" office:value="170" calcext:value-type="float">
            <text:p>1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0])" office:value-type="float" office:value="340" calcext:value-type="float">
            <text:p>34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6:39.173703592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39.1759740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02T14:26:39.479849812</dc:date>
    <meta:print-date>2019-10-31T18:04:07.913029257</meta:print-date>
    <dc:language>pt-PT</dc:language>
    <meta:editing-cycles>563</meta:editing-cycles>
    <meta:editing-duration>P1DT8H31M52S</meta:editing-duration>
    <meta:document-statistic meta:table-count="1" meta:cell-count="71" meta:object-count="0"/>
    <meta:user-defined meta:name="Info 0"/>
    <meta:user-defined meta:name="Info 1"/>
    <meta:user-defined meta:name="Info 2"/>
    <meta:user-defined meta:name="Info 3"/>
  </office:meta>
</office:document-meta>
</file>