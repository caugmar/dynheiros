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NF 6408 - process. 07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8-05" calcext:value-type="date">
            <text:p>05/08/2025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NF 6417 - process. 08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9-05" calcext:value-type="date">
            <text:p>05/09/2025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NF 6426 - process. 09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NF 6435 - process. 10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1-05" calcext:value-type="date">
            <text:p>05/11/2025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NF 6444 - process. 1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2-05" calcext:value-type="date">
            <text:p>05/12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NF 6453 - process. 1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6-01-05" calcext:value-type="date">
            <text:p>05/01/2026</text:p>
          </table:table-cell>
          <table:table-cell table:style-name="ce64" table:formula="of:=[.C7]-[.F7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NF 6462 - process. 01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6-03-05" calcext:value-type="date">
            <text:p>05/03/2026</text:p>
          </table:table-cell>
          <table:table-cell table:style-name="ce64" table:formula="of:=[.C8]-[.F8]" office:value-type="float" office:value="30" calcext:value-type="float">
            <text:p>3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NF 6471 - process. 02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50" calcext:value-type="float">
            <text:p>550,00</text:p>
          </table:table-cell>
          <table:table-cell table:style-name="ce28" office:value-type="date" office:date-value="2026-05-15" calcext:value-type="date">
            <text:p>15/05/2026</text:p>
          </table:table-cell>
          <table:table-cell table:style-name="ce64" table:formula="of:=[.C9]-[.F9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NF 6480 - process. 03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50" calcext:value-type="float">
            <text:p>550,00</text:p>
          </table:table-cell>
          <table:table-cell table:style-name="ce28" office:value-type="date" office:date-value="2026-06-05" calcext:value-type="date">
            <text:p>05/06/2026</text:p>
          </table:table-cell>
          <table:table-cell table:style-name="ce64" table:formula="of:=[.C10]-[.F10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5" office:value-type="string" calcext:value-type="string">
            <text:p>NF 6489 - process. 04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8"/>
          <table:table-cell table:style-name="ce64" table:formula="of:=[.C11]-[.F11]" office:value-type="float" office:value="550" calcext:value-type="float">
            <text:p>55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5-31" calcext:value-type="date">
            <text:p>31/05/2026</text:p>
          </table:table-cell>
          <table:table-cell table:style-name="ce35" office:value-type="string" calcext:value-type="string">
            <text:p>NF 6498 - process. 05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8"/>
          <table:table-cell table:style-name="ce64" table:formula="of:=[.C12]-[.F12]" office:value-type="float" office:value="550" calcext:value-type="float">
            <text:p>55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12])" office:value-type="float" office:value="1130" calcext:value-type="float">
            <text:p>1.130,00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43:06.129010200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43:06.136152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