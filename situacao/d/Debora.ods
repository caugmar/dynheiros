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6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2pt" fo:language="pt" fo:country="PT" fo:font-style="normal" fo:text-shadow="none" style:text-underline-style="none" style:text-underline-mode="continuous" style:text-overline-mode="continuous" style:text-line-through-mode="continuous" style:font-name-asian="HG Mincho Light J" style:font-size-asian="12pt" style:language-asian="pt" style:country-asian="BR" style:font-style-asian="normal" style:font-name-complex="Arial Unicode MS" style:font-size-complex="12pt" style:language-complex="pt" style:country-complex="BR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2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2pt" style:language-asian="pt" style:country-asian="BR" style:font-style-asian="normal" style:font-weight-asian="bold" style:font-name-complex="Arial Unicode MS" style:font-size-complex="12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language-asian="pt" style:country-asian="BR" style:font-style-asian="normal" style:font-weight-asian="normal" style:font-name-complex="Arial Unicode MS" style:font-size-complex="1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6" office:value-type="string" calcext:value-type="string">
              <text:p>DATA</text:p>
            </table:table-cell>
            <table:table-cell table:style-name="ce54" office:value-type="string" calcext:value-type="string">
              <text:p>NF - SERV. PROD. </text:p>
            </table:table-cell>
            <table:table-cell table:style-name="ce58" office:value-type="string" calcext:value-type="string">
              <text:p>R$</text:p>
            </table:table-cell>
            <table:table-cell table:style-name="ce62"/>
            <table:table-cell table:style-name="ce65" office:value-type="string" calcext:value-type="string">
              <text:p>PAGO</text:p>
            </table:table-cell>
            <table:table-cell table:style-name="ce58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71" office:value-type="string" calcext:value-type="string">
              <text:p>SALDO DEVEDOR</text:p>
            </table:table-cell>
            <table:table-cell table:style-name="ce65" office:value-type="string" calcext:value-type="string">
              <text:p>OBS.:</text:p>
            </table:table-cell>
            <table:table-cell table:style-name="ce76" table:number-columns-repeated="55"/>
          </table:table-row>
        </table:table-header-rows>
        <table:table-row table:style-name="ro2">
          <table:table-cell table:style-name="ce47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NF 6408 - process. 07/2025</text:p>
          </table:table-cell>
          <table:table-cell table:style-name="ce59" office:value-type="float" office:value="520" calcext:value-type="float">
            <text:p>52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5-08-05" calcext:value-type="date">
            <text:p>05/08/2025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NF 6417 - process. 08/2025</text:p>
          </table:table-cell>
          <table:table-cell table:style-name="ce59" office:value-type="float" office:value="520" calcext:value-type="float">
            <text:p>52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5-09-05" calcext:value-type="date">
            <text:p>05/09/2025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NF 6426 - process. 09/2025</text:p>
          </table:table-cell>
          <table:table-cell table:style-name="ce59" office:value-type="float" office:value="520" calcext:value-type="float">
            <text:p>52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5-10-08" calcext:value-type="date">
            <text:p>08/10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NF 6435 - process. 10/2025</text:p>
          </table:table-cell>
          <table:table-cell table:style-name="ce59" office:value-type="float" office:value="520" calcext:value-type="float">
            <text:p>52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5-11-05" calcext:value-type="date">
            <text:p>05/11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NF 6444 - process. 11/2025</text:p>
          </table:table-cell>
          <table:table-cell table:style-name="ce59" office:value-type="float" office:value="520" calcext:value-type="float">
            <text:p>52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5-12-05" calcext:value-type="date">
            <text:p>05/12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NF 6453 - process. 12/2025</text:p>
          </table:table-cell>
          <table:table-cell table:style-name="ce59" office:value-type="float" office:value="520" calcext:value-type="float">
            <text:p>52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6-01-05" calcext:value-type="date">
            <text:p>05/01/2026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NF 6462 - process. 01/2026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6-03-05" calcext:value-type="date">
            <text:p>05/03/2026</text:p>
          </table:table-cell>
          <table:table-cell table:style-name="ce72" table:formula="of:=[.C8]-[.F8]" office:value-type="float" office:value="30" calcext:value-type="float">
            <text:p>3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NF 6471 - process. 02/2026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3"/>
          <table:table-cell table:style-name="ce66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7"/>
          <table:table-cell table:style-name="ce72" table:formula="of:=[.C9]-[.F9]" office:value-type="float" office:value="550" calcext:value-type="float">
            <text:p>55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NF 6480 - process. 03/2026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3"/>
          <table:table-cell table:style-name="ce66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7"/>
          <table:table-cell table:style-name="ce72" table:formula="of:=[.C10]-[.F10]" office:value-type="float" office:value="550" calcext:value-type="float">
            <text:p>55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8" table:number-columns-repeated="6"/>
          <table:table-cell table:style-name="ce70" office:value-type="string" calcext:value-type="string">
            <text:p>TOTAL</text:p>
          </table:table-cell>
          <table:table-cell table:style-name="ce74" table:formula="of:=SUM([.H2:.H10])" office:value-type="float" office:value="1130" calcext:value-type="float">
            <text:p>1.130,00</text:p>
          </table:table-cell>
          <table:table-cell table:style-name="ce65"/>
          <table:table-cell table:style-name="ce76" table:number-columns-repeated="55"/>
        </table:table-row>
        <table:table-row table:style-name="ro2">
          <table:table-cell table:style-name="ce49" office:value-type="string" calcext:value-type="string">
            <text:p>Obs.: ao fazer seus pagamentos, por gentileza efetue os depósitos</text:p>
          </table:table-cell>
          <table:table-cell table:style-name="ce56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>
          <table:table-cell table:style-name="ce50" office:value-type="string" calcext:value-type="string">
            <text:p><text:span text:style-name="T4">em nome de</text:span><text:span text:style-name="T5"> MINISTER SERVIÇOS CONTÁBEIS LTDA., </text:span><text:span text:style-name="T6">BB c/c 8034-9, agência 0825-7.</text:span></text:p>
          </table:table-cell>
          <table:table-cell table:style-name="ce56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>
          <table:table-cell table:style-name="ce50"/>
          <table:table-cell table:style-name="ce56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>
          <table:table-cell table:style-name="ce52"/>
          <table:table-cell table:style-name="ce57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>
          <table:table-cell table:style-name="ce51"/>
          <table:table-cell table:style-name="ce57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 table:number-rows-repeated="31953"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37:35.460454339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37:35.4629765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