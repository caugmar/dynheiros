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Abertura da firma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2]-[.F2]" office:value-type="float" office:value="1000" calcext:value-type="float">
            <text:p>1.00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2])" office:value-type="float" office:value="1000" calcext:value-type="float">
            <text:p>1.00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1:48.244491631">00:00:00</text:time></text:span><text:span text:style-name="MT2"><text:s/></text:span></text:p>
        </style:region-center>
        <style:region-right>
          <text:p><text:span text:style-name="MT3">Deleffe Loc. Caçambas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eleffe Locação de Caçambas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1:48.2482493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16" meta:object-count="0"/>
    <meta:user-defined meta:name="Info 0"/>
    <meta:user-defined meta:name="Info 1"/>
    <meta:user-defined meta:name="Info 2"/>
    <meta:user-defined meta:name="Info 3"/>
  </office:meta>
</office:document-meta>
</file>