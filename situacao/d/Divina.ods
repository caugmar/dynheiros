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0-10" calcext:value-type="date">
            <text:p>10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3-16" calcext:value-type="date">
            <text:p>16/03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Mens. 03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5-08" calcext:value-type="date">
            <text:p>08/05/2026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4-30" calcext:value-type="date">
            <text:p>30/04/2026</text:p>
          </table:table-cell>
          <table:table-cell table:style-name="ce56" office:value-type="string" calcext:value-type="string">
            <text:p>Mens. 04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5-08" calcext:value-type="date">
            <text:p>08/05/2026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5-31" calcext:value-type="date">
            <text:p>31/05/2026</text:p>
          </table:table-cell>
          <table:table-cell table:style-name="ce56" office:value-type="string" calcext:value-type="string">
            <text:p>Mens. 05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2]-[.F12]" office:value-type="float" office:value="590" calcext:value-type="float">
            <text:p>59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2])" office:value-type="float" office:value="590" calcext:value-type="float">
            <text:p>59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20.266180355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20.2683566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6-01T10:21:20.610577530</dc:date>
    <meta:print-date>2023-11-06T10:06:24.108000000</meta:print-date>
    <dc:language>pt-PT</dc:language>
    <meta:editing-cycles>651</meta:editing-cycles>
    <meta:editing-duration>P2DT18H57M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