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0-10" calcext:value-type="date">
            <text:p>10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Mens. 01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90" calcext:value-type="float">
            <text:p>59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Mens. 02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90" calcext:value-type="float">
            <text:p>590,00</text:p>
          </table:table-cell>
          <table:table-cell table:style-name="ce50" office:value-type="date" office:date-value="2026-03-16" calcext:value-type="date">
            <text:p>16/03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6" office:value-type="string" calcext:value-type="string">
            <text:p>Mens. 03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0]-[.F10]" office:value-type="float" office:value="590" calcext:value-type="float">
            <text:p>59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10])" office:value-type="float" office:value="590" calcext:value-type="float">
            <text:p>59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4">
      <number:text>R$-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41.550335852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41.5525211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02T14:26:41.841945880</dc:date>
    <meta:print-date>2023-11-06T10:06:24.108000000</meta:print-date>
    <dc:language>pt-PT</dc:language>
    <meta:editing-cycles>648</meta:editing-cycles>
    <meta:editing-duration>P2DT18H56M44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