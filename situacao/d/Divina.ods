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3-16" calcext:value-type="date">
            <text:p>16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5-08" calcext:value-type="date">
            <text:p>08/05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5-08" calcext:value-type="date">
            <text:p>08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Mens. 05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6-30" calcext:value-type="date">
            <text:p>30/06/2026</text:p>
          </table:table-cell>
          <table:table-cell table:style-name="ce56" office:value-type="string" calcext:value-type="string">
            <text:p>Mens. 06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3])" office:value-type="float" office:value="1180" calcext:value-type="float">
            <text:p>1.18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7.462834525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7.4650737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57.768068207</dc:date>
    <meta:print-date>2023-11-06T10:06:24.108000000</meta:print-date>
    <dc:language>pt-PT</dc:language>
    <meta:editing-cycles>652</meta:editing-cycles>
    <meta:editing-duration>P2DT18H57M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