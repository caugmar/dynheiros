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2-13" calcext:value-type="date">
            <text:p>13/02/2026</text:p>
          </table:table-cell>
          <table:table-cell table:style-name="ce8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3-20" calcext:value-type="date">
            <text:p>20/03/2026</text:p>
          </table:table-cell>
          <table:table-cell table:style-name="ce8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4-15" calcext:value-type="date">
            <text:p>15/04/2026</text:p>
          </table:table-cell>
          <table:table-cell table:style-name="ce8" table:formula="of:=[.C10]-[.F10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3"/>
          <table:table-cell table:style-name="ce8" table:formula="of:=[.C11]-[.F11]" office:value-type="float" office:value="320" calcext:value-type="float">
            <text:p>32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11])" office:value-type="float" office:value="320" calcext:value-type="float">
            <text:p>32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3.6199231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3.621050714">00:00:00</text:time></text:span><text:span text:style-name="MT2"><text:time style:data-style-name="N2" text:time-value="15:57:23.621074404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4-30T15:57:23.932403928</dc:date>
    <meta:editing-cycles>709</meta:editing-cycles>
    <meta:editing-duration>PT1H55M58S</meta:editing-duration>
    <meta:print-date>2022-07-04T10:09:13.162219555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