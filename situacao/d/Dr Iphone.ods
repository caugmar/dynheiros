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298 - mens. 09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6" calcext:value-type="date">
            <text:p>06/10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12 - mens. 10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06" calcext:value-type="date">
            <text:p>06/11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26 - mens. 1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4" calcext:value-type="date">
            <text:p>04/12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0 - mens. 1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06" calcext:value-type="date">
            <text:p>06/01/2026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NF 13354 - mens. 01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2-06" calcext:value-type="date">
            <text:p>06/02/2026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NF 13368 - mens. 02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3-05" calcext:value-type="date">
            <text:p>05/03/2026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NF 13382 - mens. 03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4-06" calcext:value-type="date">
            <text:p>06/04/2026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4-30" calcext:value-type="date">
            <text:p>30/04/2026</text:p>
          </table:table-cell>
          <table:table-cell table:style-name="ce59" office:value-type="string" calcext:value-type="string">
            <text:p>NF 13396 - mens. 04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5-15" calcext:value-type="date">
            <text:p>15/05/2026</text:p>
          </table:table-cell>
          <table:table-cell table:style-name="ce72" table:formula="of:=[.C11]-[.F11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5-31" calcext:value-type="date">
            <text:p>31/05/2026</text:p>
          </table:table-cell>
          <table:table-cell table:style-name="ce59" office:value-type="string" calcext:value-type="string">
            <text:p>NF 13410 - mens. 05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6-03" calcext:value-type="date">
            <text:p>03/06/2026</text:p>
          </table:table-cell>
          <table:table-cell table:style-name="ce72" table:formula="of:=[.C12]-[.F1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2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40:36.159058100">00:00:00</text:time></text:span><text:span text:style-name="MT2"><text:time style:data-style-name="N2" text:time-value="15:40:36.159105800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40:36.170228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31:56</meta:creation-date>
    <dc:date>2026-06-12T15:41:15.224841200</dc:date>
    <dc:language>pt-PT</dc:language>
    <meta:editing-cycles>689</meta:editing-cycles>
    <meta:editing-duration>P1DT10H56M43S</meta:editing-duration>
    <meta:print-date>2022-07-01T10:31:27.249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