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4 - mens. 08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298 - mens. 09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6" calcext:value-type="date">
            <text:p>06/10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12 - mens. 10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1-06" calcext:value-type="date">
            <text:p>06/11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NF 13326 - mens. 1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4" calcext:value-type="date">
            <text:p>04/12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NF 13340 - mens. 1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06" calcext:value-type="date">
            <text:p>06/01/2026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NF 13354 - mens. 01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2-06" calcext:value-type="date">
            <text:p>06/02/2026</text:p>
          </table:table-cell>
          <table:table-cell table:style-name="ce72" table:formula="of:=[.C8]-[.F8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NF 13368 - mens. 02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3-05" calcext:value-type="date">
            <text:p>05/03/2026</text:p>
          </table:table-cell>
          <table:table-cell table:style-name="ce72" table:formula="of:=[.C9]-[.F9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NF 13382 - mens. 03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4-06" calcext:value-type="date">
            <text:p>06/04/2026</text:p>
          </table:table-cell>
          <table:table-cell table:style-name="ce72" table:formula="of:=[.C10]-[.F10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0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0">00/00/0000</text:date></text:span><text:span text:style-name="MT2"><text:s/>- </text:span><text:span text:style-name="MT2"><text:time style:data-style-name="N2" text:time-value="16:41:47.788239900">00:00:00</text:time></text:span><text:span text:style-name="MT2"><text:time style:data-style-name="N2" text:time-value="16:41:47.788282000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6:41:47.799229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31:56</meta:creation-date>
    <dc:date>2026-04-10T16:41:57.013676500</dc:date>
    <dc:language>pt-PT</dc:language>
    <meta:editing-cycles>685</meta:editing-cycles>
    <meta:editing-duration>P1DT10H55M20S</meta:editing-duration>
    <meta:print-date>2022-07-01T10:31:27.249000000</meta:print-date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