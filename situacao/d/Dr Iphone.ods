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54 - mens. 01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2-06" calcext:value-type="date">
            <text:p>06/02/2026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68 - mens. 02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3-05" calcext:value-type="date">
            <text:p>05/03/2026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NF 13382 - mens. 03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4-06" calcext:value-type="date">
            <text:p>06/04/2026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NF 13396 - mens. 04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5-15" calcext:value-type="date">
            <text:p>15/05/2026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5-31" calcext:value-type="date">
            <text:p>31/05/2026</text:p>
          </table:table-cell>
          <table:table-cell table:style-name="ce59" office:value-type="string" calcext:value-type="string">
            <text:p>NF 13410 - mens. 05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6-03" calcext:value-type="date">
            <text:p>03/06/2026</text:p>
          </table:table-cell>
          <table:table-cell table:style-name="ce72" table:formula="of:=[.C12]-[.F1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6-30" calcext:value-type="date">
            <text:p>30/06/2026</text:p>
          </table:table-cell>
          <table:table-cell table:style-name="ce59" office:value-type="string" calcext:value-type="string">
            <text:p>NF 13424 - mens. 06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3]-[.F13]" office:value-type="float" office:value="310" calcext:value-type="float">
            <text:p>31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3])" office:value-type="float" office:value="310" calcext:value-type="float">
            <text:p>31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36.273673844">00:00:00</text:time></text:span><text:span text:style-name="MT2"><text:time style:data-style-name="N2" text:time-value="10:08:36.273708848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36.2791272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7-01T10:08:37.132284622</dc:date>
    <dc:language>pt-PT</dc:language>
    <meta:editing-cycles>690</meta:editing-cycles>
    <meta:editing-duration>P1DT10H56M43S</meta:editing-duration>
    <meta:print-date>2022-07-01T10:31:27.249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