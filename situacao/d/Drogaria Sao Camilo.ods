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6418 - process. 08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13285 - mens. 08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6427 - process. 09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13299 - mens. 09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6436 - process. 10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13313 - mens. 10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6445 - process. 1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13327 - mens. 1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6454 - process. 1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13341 - mens. 1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NF 6463 - process. 01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NF 13355 - mens. 01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39" office:value-type="string" calcext:value-type="string">
            <text:p>NF 6472 - process. 02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6]-[.F16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39" office:value-type="string" calcext:value-type="string">
            <text:p>NF 13369 - mens. 02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7]-[.F17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39" office:value-type="string" calcext:value-type="string">
            <text:p>NF 6481 - process. 03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8]-[.F18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39" office:value-type="string" calcext:value-type="string">
            <text:p>NF 13383 - mens. 03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9]-[.F19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19])" office:value-type="float" office:value="5660" calcext:value-type="float">
            <text:p>5.660,00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43.293628357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43.2958985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4-02T14:26:44.102159837</dc:date>
    <dc:language>pt-PT</dc:language>
    <meta:editing-cycles>780</meta:editing-cycles>
    <meta:editing-duration>P2DT7H29M45S</meta:editing-duration>
    <meta:print-date>2025-01-10T10:51:14.964000000</meta:print-date>
    <meta:document-statistic meta:table-count="1" meta:cell-count="132" meta:object-count="0"/>
    <meta:user-defined meta:name="Info 0"/>
    <meta:user-defined meta:name="Info 1"/>
    <meta:user-defined meta:name="Info 2"/>
    <meta:user-defined meta:name="Info 3"/>
  </office:meta>
</office:document-meta>
</file>