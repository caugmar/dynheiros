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6463 - process. 01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13355 - mens. 01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6472 - process. 02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4-24" calcext:value-type="date">
            <text:p>24/04/2026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13369 - mens. 02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4-24" calcext:value-type="date">
            <text:p>24/04/2026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6481 - process. 03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4-30" calcext:value-type="date">
            <text:p>30/04/2026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13383 - mens. 03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4-30" calcext:value-type="date">
            <text:p>30/04/2026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NF 6490 - process. 04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0]-[.F20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NF 13397 - mens. 04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1]-[.F21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1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4.804012647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4.8061603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4-30T15:57:25.571561624</dc:date>
    <dc:language>pt-PT</dc:language>
    <meta:editing-cycles>785</meta:editing-cycles>
    <meta:editing-duration>P2DT7H32M7S</meta:editing-duration>
    <meta:print-date>2025-01-10T10:51:14.964000000</meta:print-date>
    <meta:document-statistic meta:table-count="1" meta:cell-count="148" meta:object-count="0"/>
    <meta:user-defined meta:name="Info 0"/>
    <meta:user-defined meta:name="Info 1"/>
    <meta:user-defined meta:name="Info 2"/>
    <meta:user-defined meta:name="Info 3"/>
  </office:meta>
</office:document-meta>
</file>