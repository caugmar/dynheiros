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6472 - process. 02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13369 - mens. 02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6481 - process. 03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13383 - mens. 03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6490 - process. 04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6-01" calcext:value-type="date">
            <text:p>01/06/2026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13397 - mens. 04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6-01" calcext:value-type="date">
            <text:p>01/06/2026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NF 6499 - process. 05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2]-[.F22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NF 13411 - mens. 05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3]-[.F23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6-30" calcext:value-type="date">
            <text:p>30/06/2026</text:p>
          </table:table-cell>
          <table:table-cell table:style-name="ce39" office:value-type="string" calcext:value-type="string">
            <text:p>NF 6508 - process. 06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4]-[.F24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6-30" calcext:value-type="date">
            <text:p>30/06/2026</text:p>
          </table:table-cell>
          <table:table-cell table:style-name="ce39" office:value-type="string" calcext:value-type="string">
            <text:p>NF 13425 - mens. 06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5]-[.F25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5])" office:value-type="float" office:value="5660" calcext:value-type="float">
            <text:p>5.66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9.348499441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9.3507426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7-01T10:09:00.188060024</dc:date>
    <dc:language>pt-PT</dc:language>
    <meta:editing-cycles>790</meta:editing-cycles>
    <meta:editing-duration>P2DT7H33M32S</meta:editing-duration>
    <meta:print-date>2025-01-10T10:51:14.964000000</meta:print-date>
    <meta:document-statistic meta:table-count="1" meta:cell-count="174" meta:object-count="0"/>
    <meta:user-defined meta:name="Info 0"/>
    <meta:user-defined meta:name="Info 1"/>
    <meta:user-defined meta:name="Info 2"/>
    <meta:user-defined meta:name="Info 3"/>
  </office:meta>
</office:document-meta>
</file>