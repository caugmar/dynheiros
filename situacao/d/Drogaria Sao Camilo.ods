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6472 - process. 02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13369 - mens. 02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24" calcext:value-type="date">
            <text:p>24/04/2026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6481 - process. 03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39" office:value-type="string" calcext:value-type="string">
            <text:p>NF 13383 - mens. 03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4-30" calcext:value-type="date">
            <text:p>30/04/2026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6490 - process. 04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6-01" calcext:value-type="date">
            <text:p>01/06/2026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39" office:value-type="string" calcext:value-type="string">
            <text:p>NF 13397 - mens. 04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6-01" calcext:value-type="date">
            <text:p>01/06/2026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NF 6499 - process. 05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2]-[.F22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39" office:value-type="string" calcext:value-type="string">
            <text:p>NF 13411 - mens. 05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3]-[.F23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3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1:17:47.8332864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1:17:47.83995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45:27</meta:creation-date>
    <dc:date>2026-06-01T11:19:12.611786800</dc:date>
    <dc:language>pt-PT</dc:language>
    <meta:editing-cycles>788</meta:editing-cycles>
    <meta:editing-duration>P2DT7H33M32S</meta:editing-duration>
    <meta:print-date>2025-01-10T10:51:14.964000000</meta:print-date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