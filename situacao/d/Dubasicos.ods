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17])" office:value-type="float" office:value="4000" calcext:value-type="float">
            <text:p>4.00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4.415312033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4.4181395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