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6" office:value-type="string" calcext:value-type="string">
            <text:p>Mens. 06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20])" office:value-type="float" office:value="4750" calcext:value-type="float">
            <text:p>4.75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0.516152396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0.5188798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