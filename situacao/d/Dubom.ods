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6428 - process. 09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4">
            <text:p>PG – R$ 1.987,08</text:p>
            <text:p>09/2025 – 440,00</text:p>
            <text:p>09/2025 – 500,00</text:p>
            <text:p>10/2025 – 440,00</text:p>
            <text:p>10/2025 – 607,08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13300 - mens. 09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3]-[.F3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6437 - process. 10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4]-[.F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13314 - mens. 10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607.08" calcext:value-type="float">
            <text:p>607,08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5]-[.F5]" office:value-type="float" office:value="-107.08" calcext:value-type="float">
            <text:p>(107,08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6446 - process. 11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332.92" calcext:value-type="float">
            <text:p>332,92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6]-[.F6]" office:value-type="float" office:value="107.08" calcext:value-type="float">
            <text:p>107,08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13328 - mens. 11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Alteração atividade e endereço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5">
            <text:p>PG – R$ 2.911,11</text:p>
            <text:p>Alteração – 1.000,00</text:p>
            <text:p>12/2025 – 440,00</text:p>
            <text:p>12/2025 – 500,00</text:p>
            <text:p>01/2026 – 470,00</text:p>
            <text:p>01/2026 – 501,11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6455 - process. 12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9]-[.F9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13342 - mens. 12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0]-[.F10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6464 - process. 01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70" calcext:value-type="float">
            <text:p>47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1]-[.F11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13356 - mens. 01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1.11" calcext:value-type="float">
            <text:p>501,11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2]-[.F12]" office:value-type="float" office:value="-1.11" calcext:value-type="float">
            <text:p>(1,11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6473 - process. 02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68.89" calcext:value-type="float">
            <text:p>468,89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3]-[.F13]" office:value-type="float" office:value="1.11" calcext:value-type="float">
            <text:p>1,11</text:p>
          </table:table-cell>
          <table:table-cell table:style-name="ce41" office:value-type="string" calcext:value-type="string" table:number-columns-spanned="1" table:number-rows-spanned="4">
            <text:p>PG – R$ 2.395.33</text:p>
            <text:p>02/2026 – 468,89</text:p>
            <text:p>02/2026 – 500,00</text:p>
            <text:p>03/2026 – 470,00</text:p>
            <text:p>03/2026 – 516,44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13370 - mens. 02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4]-[.F1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NF 6482 - process. 03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70" calcext:value-type="float">
            <text:p>470,00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5]-[.F15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NF 13384 - mens. 03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16.44" calcext:value-type="float">
            <text:p>516,44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6]-[.F16]" office:value-type="float" office:value="-16.44" calcext:value-type="float">
            <text:p>(16,44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NF 6491 - process. 04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NF 13398 - mens. 04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NF 6500 - process. 05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NF 13412 - mens. 05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0]-[.F20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6-30" calcext:value-type="date">
            <text:p>30/06/2026</text:p>
          </table:table-cell>
          <table:table-cell table:style-name="ce6" office:value-type="string" calcext:value-type="string">
            <text:p>NF 6509 - process. 06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1]-[.F21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6-30" calcext:value-type="date">
            <text:p>30/06/2026</text:p>
          </table:table-cell>
          <table:table-cell table:style-name="ce6" office:value-type="string" calcext:value-type="string">
            <text:p>NF 13426 - mens. 06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2]-[.F22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66" table:formula="of:=SUM([.H2:.H22])" office:value-type="float" office:value="2893.56" calcext:value-type="float">
            <text:p>2.893,56</text:p>
          </table:table-cell>
          <table:table-cell table:style-name="ce24"/>
          <table:table-cell table:style-name="ce83" table:number-columns-repeated="55"/>
        </table:table-row>
        <table:table-row table:style-name="ro3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6.203023956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6.2057609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154" meta:object-count="0"/>
    <meta:user-defined meta:name="Info 0"/>
    <meta:user-defined meta:name="Info 1"/>
    <meta:user-defined meta:name="Info 2"/>
    <meta:user-defined meta:name="Info 3"/>
  </office:meta>
</office:document-meta>
</file>