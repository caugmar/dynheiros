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>
      <style:text-properties fo:font-size="12pt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1-12" calcext:value-type="date">
            <text:p>12/01/2026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NF 13357 - mens. 01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NF 13371 - mens. 02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3-10" calcext:value-type="date">
            <text:p>10/03/2026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3-31" calcext:value-type="date">
            <text:p>31/03/2026</text:p>
          </table:table-cell>
          <table:table-cell table:style-name="ce63" office:value-type="string" calcext:value-type="string">
            <text:p>NF 13385 - mens. 03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4-09" calcext:value-type="date">
            <text:p>09/04/2026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4-30" calcext:value-type="date">
            <text:p>30/04/2026</text:p>
          </table:table-cell>
          <table:table-cell table:style-name="ce63" office:value-type="string" calcext:value-type="string">
            <text:p>NF 13399 - mens. 04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5-08" calcext:value-type="date">
            <text:p>08/05/2026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5-31" calcext:value-type="date">
            <text:p>31/05/2026</text:p>
          </table:table-cell>
          <table:table-cell table:style-name="ce63" office:value-type="string" calcext:value-type="string">
            <text:p>NF 13413 - mens. 05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6-08" calcext:value-type="date">
            <text:p>08/06/2026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2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20:06.4766936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20:06.4825917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20:06.491628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4:59:29</meta:creation-date>
    <dc:date>2026-06-12T16:16:06.090029500</dc:date>
    <meta:print-date>2014-03-31T11:38:55.658630431</meta:print-date>
    <dc:language>pt-PT</dc:language>
    <meta:editing-cycles>546</meta:editing-cycles>
    <meta:editing-duration>P2DT13H28M7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