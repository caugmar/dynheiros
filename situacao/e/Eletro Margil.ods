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NF 13357 - mens. 01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NF 13371 - mens. 02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3-10" calcext:value-type="date">
            <text:p>10/03/2026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NF 13385 - mens. 03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4-09" calcext:value-type="date">
            <text:p>09/04/2026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3" office:value-type="string" calcext:value-type="string">
            <text:p>NF 13399 - mens. 04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11]-[.F11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1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7.094502952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7.095955534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7.0992186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27.434537128</dc:date>
    <meta:print-date>2014-03-31T11:38:55.658630431</meta:print-date>
    <dc:language>pt-PT</dc:language>
    <meta:editing-cycles>543</meta:editing-cycles>
    <meta:editing-duration>P2DT13H27M16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