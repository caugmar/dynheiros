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2-09" calcext:value-type="date">
            <text:p>09/02/2026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3-11" calcext:value-type="date">
            <text:p>11/03/2026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09" calcext:value-type="date">
            <text:p>09/04/2026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11]-[.F11]" office:value-type="float" office:value="490" calcext:value-type="float">
            <text:p>49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1])" office:value-type="float" office:value="490" calcext:value-type="float">
            <text:p>49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7.728356195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7.7310198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4-30T15:57:28.002679211</dc:date>
    <meta:print-date>2022-02-07T15:45:15.821000000</meta:print-date>
    <dc:language>pt-PT</dc:language>
    <meta:editing-cycles>594</meta:editing-cycles>
    <meta:editing-duration>PT19H36M39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