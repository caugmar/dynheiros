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11-14" calcext:value-type="date">
            <text:p>14/11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11-14" calcext:value-type="date">
            <text:p>14/11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6-01-28" calcext:value-type="date">
            <text:p>28/01/2026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6-09" calcext:value-type="date">
            <text:p>09/06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6-06-09" calcext:value-type="date">
            <text:p>09/06/2026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1]-[.F11]" office:value-type="float" office:value="300" calcext:value-type="float">
            <text:p>3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Mens. 06/2026 (A.C.)</text:p>
          </table:table-cell>
          <table:table-cell table:style-name="ce38" office:value-type="float" office:value="300" calcext:value-type="float">
            <text:p>3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2]-[.F12]" office:value-type="float" office:value="300" calcext:value-type="float">
            <text:p>3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2])" office:value-type="float" office:value="600" calcext:value-type="float">
            <text:p>600,00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3.20202328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3.2041650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03.544981620</dc:date>
    <meta:print-date>2019-12-18T13:30:11.329000000</meta:print-date>
    <dc:language>pt-PT</dc:language>
    <meta:editing-cycles>484</meta:editing-cycles>
    <meta:editing-duration>PT15H22M58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