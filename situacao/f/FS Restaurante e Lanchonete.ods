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number-columns-repeated="55" table:default-cell-style-name="ce32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11-14" calcext:value-type="date">
            <text:p>14/11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11-14" calcext:value-type="date">
            <text:p>14/11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6-01-28" calcext:value-type="date">
            <text:p>28/01/2026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6-01-28" calcext:value-type="date">
            <text:p>28/01/2026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6-01-28" calcext:value-type="date">
            <text:p>28/01/2026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6-09" calcext:value-type="date">
            <text:p>09/06/2026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6-09" calcext:value-type="date">
            <text:p>09/06/2026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1]-[.F11]" office:value-type="float" office:value="300" calcext:value-type="float">
            <text:p>30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7" table:formula="of:=SUM([.H2:.H11])" office:value-type="float" office:value="300" calcext:value-type="float">
            <text:p>300,00</text:p>
          </table:table-cell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31978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22:17.617626900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22:17.62425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50:15</meta:creation-date>
    <dc:date>2026-06-12T16:20:40.057900700</dc:date>
    <meta:print-date>2019-12-18T13:30:11.329000000</meta:print-date>
    <dc:language>pt-PT</dc:language>
    <meta:editing-cycles>483</meta:editing-cycles>
    <meta:editing-duration>PT15H22M58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