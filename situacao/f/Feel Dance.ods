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1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8-07" calcext:value-type="date">
            <text:p>07/08/2025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2-10" calcext:value-type="date">
            <text:p>10/02/2026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3-09" calcext:value-type="date">
            <text:p>09/03/2026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8" table:formula="of:=[.C10]-[.F10]" office:value-type="float" office:value="440" calcext:value-type="float">
            <text:p>44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10])" office:value-type="float" office:value="440" calcext:value-type="float">
            <text:p>440,00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47.586011860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47.5890235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02T14:26:47.883361360</dc:date>
    <meta:print-date>2019-11-26T09:35:59.125000000</meta:print-date>
    <dc:language>pt-PT</dc:language>
    <meta:editing-cycles>491</meta:editing-cycles>
    <meta:editing-duration>PT14H40M6S</meta:editing-duration>
    <meta:document-statistic meta:table-count="1" meta:cell-count="75" meta:object-count="0"/>
    <meta:user-defined meta:name="Info 0"/>
    <meta:user-defined meta:name="Info 1"/>
    <meta:user-defined meta:name="Info 2"/>
    <meta:user-defined meta:name="Info 3"/>
  </office:meta>
</office:document-meta>
</file>