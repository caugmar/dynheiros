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2-10" calcext:value-type="date">
            <text:p>10/02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4-10" calcext:value-type="date">
            <text:p>10/04/2026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1]-[.F11]" office:value-type="float" office:value="440" calcext:value-type="float">
            <text:p>44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1])" office:value-type="float" office:value="440" calcext:value-type="float">
            <text:p>44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8.939336448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8.9421930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29.263694538</dc:date>
    <meta:print-date>2019-11-26T09:35:59.125000000</meta:print-date>
    <dc:language>pt-PT</dc:language>
    <meta:editing-cycles>493</meta:editing-cycles>
    <meta:editing-duration>PT14H41M46S</meta:editing-duration>
    <meta:document-statistic meta:table-count="1" meta:cell-count="82" meta:object-count="0"/>
    <meta:user-defined meta:name="Info 0"/>
    <meta:user-defined meta:name="Info 1"/>
    <meta:user-defined meta:name="Info 2"/>
    <meta:user-defined meta:name="Info 3"/>
  </office:meta>
</office:document-meta>
</file>