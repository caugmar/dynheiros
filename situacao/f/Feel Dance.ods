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2-10" calcext:value-type="date">
            <text:p>10/02/2026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4-10" calcext:value-type="date">
            <text:p>10/04/2026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5-11" calcext:value-type="date">
            <text:p>11/05/2026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2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25:34.77762370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25:34.78896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50:15</meta:creation-date>
    <dc:date>2026-06-12T16:26:11.114112500</dc:date>
    <meta:print-date>2019-11-26T09:35:59.125000000</meta:print-date>
    <dc:language>pt-PT</dc:language>
    <meta:editing-cycles>496</meta:editing-cycles>
    <meta:editing-duration>PT14H42M50S</meta:editing-duration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