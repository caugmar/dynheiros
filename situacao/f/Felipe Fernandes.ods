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30" calcext:value-type="date">
            <text:p>30/04/2026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1]-[.F11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1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HG Mincho Light J" svg:font-family="'HG Mincho Light J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5-04">00/00/0000</text:date></text:span><text:span text:style-name="MT2"><text:s/>- </text:span><text:span text:style-name="MT2"><text:time style:data-style-name="N2" text:time-value="11:32:59.0201342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1:32:59.033608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50:15</meta:creation-date>
    <dc:date>2026-05-04T11:33:11.783094000</dc:date>
    <meta:print-date>2019-12-18T13:30:11.329000000</meta:print-date>
    <dc:language>pt-PT</dc:language>
    <meta:editing-cycles>458</meta:editing-cycles>
    <meta:editing-duration>PT15H6M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