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30" calcext:value-type="date">
            <text:p>30/04/2026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1]-[.F11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5-31" calcext:value-type="date">
            <text:p>31/05/2026</text:p>
          </table:table-cell>
          <table:table-cell table:style-name="ce59" office:value-type="string" calcext:value-type="string">
            <text:p>Mens. 05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2]-[.F12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2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27.33263078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27.3346601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6-01T10:21:27.709370889</dc:date>
    <meta:print-date>2019-12-18T13:30:11.329000000</meta:print-date>
    <dc:language>pt-PT</dc:language>
    <meta:editing-cycles>459</meta:editing-cycles>
    <meta:editing-duration>PT15H6M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