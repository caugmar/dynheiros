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0]-[.F10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0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8.17109068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8.1730889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6:48.506665845</dc:date>
    <meta:print-date>2019-12-18T13:30:11.329000000</meta:print-date>
    <dc:language>pt-PT</dc:language>
    <meta:editing-cycles>456</meta:editing-cycles>
    <meta:editing-duration>PT15H5M48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