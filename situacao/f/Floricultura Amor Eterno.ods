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6]-[.F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7]-[.F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8]-[.F8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9]-[.F9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0]-[.F10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1]-[.F11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1])" office:value-type="float" office:value="1600" calcext:value-type="float">
            <text:p>1.60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0.209249021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0.2113580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30.549833010</dc:date>
    <meta:print-date>2017-06-28T17:59:52</meta:print-date>
    <dc:language>pt-PT</dc:language>
    <meta:editing-cycles>355</meta:editing-cycles>
    <meta:editing-duration>PT11H44M51S</meta:editing-duration>
    <meta:printed-by>Carlos Augusto Marcicano</meta:printed-by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