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6]-[.F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7]-[.F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62" office:value-type="string" calcext:value-type="string">
            <text:p>Mens. 01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8]-[.F8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9]-[.F9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0]-[.F10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0])" office:value-type="float" office:value="1330" calcext:value-type="float">
            <text:p>1.33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8.821934412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8.8242037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6:49.188980304</dc:date>
    <meta:print-date>2017-06-28T17:59:52</meta:print-date>
    <dc:language>pt-PT</dc:language>
    <meta:editing-cycles>354</meta:editing-cycles>
    <meta:editing-duration>PT11H44M51S</meta:editing-duration>
    <meta:printed-by>Carlos Augusto Marcicano</meta:printed-by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