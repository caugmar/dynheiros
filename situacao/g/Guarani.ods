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2-25" calcext:value-type="date">
            <text:p>25/02/2026</text:p>
          </table:table-cell>
          <table:table-cell table:style-name="ce66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3-25" calcext:value-type="date">
            <text:p>25/03/2026</text:p>
          </table:table-cell>
          <table:table-cell table:style-name="ce66" table:formula="of:=[.C9]-[.F9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80" calcext:value-type="float">
            <text:p>380,00</text:p>
          </table:table-cell>
          <table:table-cell table:style-name="ce56" office:value-type="date" office:date-value="2026-04-23" calcext:value-type="date">
            <text:p>23/04/2026</text:p>
          </table:table-cell>
          <table:table-cell table:style-name="ce66" table:formula="of:=[.C10]-[.F10]" office:value-type="float" office:value="-30" calcext:value-type="float">
            <text:p>(30,00)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50" calcext:value-type="float">
            <text:p>350,00</text:p>
          </table:table-cell>
          <table:table-cell table:style-name="ce56" office:value-type="date" office:date-value="2026-05-21" calcext:value-type="date">
            <text:p>21/05/2026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1" office:value-type="string" calcext:value-type="string">
            <text:p>Mens. 05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50" calcext:value-type="float">
            <text:p>350,00</text:p>
          </table:table-cell>
          <table:table-cell table:style-name="ce56" office:value-type="date" office:date-value="2026-06-22" calcext:value-type="date">
            <text:p>22/06/2026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2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09:51:28.5644125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51:28.57827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43:05</meta:creation-date>
    <dc:date>2026-06-25T09:52:07.975101000</dc:date>
    <dc:language>pt-PT</dc:language>
    <meta:editing-cycles>564</meta:editing-cycles>
    <meta:editing-duration>PT20H54M41S</meta:editing-duration>
    <meta:print-date>2020-08-12T13:53:36.446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