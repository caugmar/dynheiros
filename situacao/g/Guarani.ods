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1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8-22" calcext:value-type="date">
            <text:p>22/08/2025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9-23" calcext:value-type="date">
            <text:p>23/09/2025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0-23" calcext:value-type="date">
            <text:p>23/10/2025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1-24" calcext:value-type="date">
            <text:p>24/11/2025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2-22" calcext:value-type="date">
            <text:p>22/12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1-26" calcext:value-type="date">
            <text:p>26/01/2026</text:p>
          </table:table-cell>
          <table:table-cell table:style-name="ce66" table:formula="of:=[.C7]-[.F7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1" office:value-type="string" calcext:value-type="string">
            <text:p>Mens. 01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2-25" calcext:value-type="date">
            <text:p>25/02/2026</text:p>
          </table:table-cell>
          <table:table-cell table:style-name="ce66" table:formula="of:=[.C8]-[.F8]" office:value-type="float" office:value="10" calcext:value-type="float">
            <text:p>1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2-28" calcext:value-type="date">
            <text:p>28/02/2026</text:p>
          </table:table-cell>
          <table:table-cell table:style-name="ce61" office:value-type="string" calcext:value-type="string">
            <text:p>Mens. 02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3-25" calcext:value-type="date">
            <text:p>25/03/2026</text:p>
          </table:table-cell>
          <table:table-cell table:style-name="ce66" table:formula="of:=[.C9]-[.F9]" office:value-type="float" office:value="10" calcext:value-type="float">
            <text:p>1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3-31" calcext:value-type="date">
            <text:p>31/03/2026</text:p>
          </table:table-cell>
          <table:table-cell table:style-name="ce61" office:value-type="string" calcext:value-type="string">
            <text:p>Mens. 03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6"/>
          <table:table-cell table:style-name="ce66" table:formula="of:=[.C10]-[.F10]" office:value-type="float" office:value="350" calcext:value-type="float">
            <text:p>35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10])" office:value-type="float" office:value="370" calcext:value-type="float">
            <text:p>370,00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textual="true"/>
      <number:text> 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DM""""""""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22">
      <number:text>- DM""""""""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number-style style:name="N135P0" style:volatile="true">
      <number:text>R$""""""""""""""""""""""""""""""""""""""""""""""""""</number:text>
    </number:number-style>
    <number:number-style style:name="N135P1" style:volatile="true">
      <number:text>R$(""""""""""""""""""""""""""""""""""""""""""""""""""</number:text>
    </number:number-style>
    <number:number-style style:name="N135">
      <number:text>R$-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number:min-decimal-places="2" number:min-integer-digits="1" number:grouping="true"/>
      <number:text> DM""""""""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9">
      <number:text>-</number:text>
      <number:number number:decimal-places="0" number:min-decimal-places="0" number:min-integer-digits="0"/>
      <number:text> DM""""""""</number:text>
      <style:map style:condition="value()&gt;0" style:apply-style-name="N149P0"/>
      <style:map style:condition="value()&lt;0" style:apply-style-name="N149P1"/>
    </number:number-style>
    <number:time-style style:name="N150">
      <number:minutes number:style="long"/>
      <number:text>:</number:text>
      <number:seconds number:style="long"/>
      <number:text>,</number:text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DM""""""""</number:text>
    </number:number-style>
    <number:number-style style:name="N153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53P0"/>
    </number:number-style>
    <number:number-style style:name="N155P0" style:volatile="true">
      <number:text>R$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day number:style="long"/>
      <number:text>.</number:text>
      <number:month number:style="long"/>
      <number:text>.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DM""""""""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3P0"/>
    </number:number-style>
    <number:number-style style:name="N165P0" style:volatile="true">
      <number:text>R$""""""""</number:text>
      <number:number number:decimal-places="0" number:min-decimal-places="0" number:min-integer-digits="1" number:grouping="true"/>
    </number:number-style>
    <number:number-style style:name="N165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5">
      <number:text>R$-""""""""</number:text>
      <style:map style:condition="value()&gt;0" style:apply-style-name="N165P0"/>
      <style:map style:condition="value()&lt;0" style:apply-style-name="N165P1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DM""""""""</number:text>
    </number:number-style>
    <number:number-style style:name="N16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DM""""""""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76P0"/>
    </number:number-style>
    <number:date-style style:name="N177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49.512550849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49.51541020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6-04-02T14:26:49.815216307</dc:date>
    <dc:language>pt-PT</dc:language>
    <meta:editing-cycles>557</meta:editing-cycles>
    <meta:editing-duration>PT20H51M29S</meta:editing-duration>
    <meta:print-date>2020-08-12T13:53:36.446000000</meta:print-date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