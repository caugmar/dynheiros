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42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2]-[.F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NF 13274 - mens. 07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3]-[.F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NF 13288 - mens. 08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5]-[.F5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6]-[.F6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NF 13302 - mens. 09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7]-[.F7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8]-[.F8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NF 13316 - mens. 10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9]-[.F9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0]-[.F10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NF 13330 - mens. 11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1]-[.F11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35" table:formula="of:=[.C12]-[.F1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NF 13344 - mens. 12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35" table:formula="of:=[.C13]-[.F1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04" calcext:value-type="date">
            <text:p>04/03/2026</text:p>
          </table:table-cell>
          <table:table-cell table:style-name="ce35" table:formula="of:=[.C14]-[.F14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NF 13358 - mens. 01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04" calcext:value-type="date">
            <text:p>04/03/2026</text:p>
          </table:table-cell>
          <table:table-cell table:style-name="ce35" table:formula="of:=[.C15]-[.F15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23" calcext:value-type="date">
            <text:p>23/03/2026</text:p>
          </table:table-cell>
          <table:table-cell table:style-name="ce35" table:formula="of:=[.C16]-[.F16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NF 13372 - mens. 02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23" calcext:value-type="date">
            <text:p>23/03/2026</text:p>
          </table:table-cell>
          <table:table-cell table:style-name="ce35" table:formula="of:=[.C17]-[.F17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18]-[.F18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NF 13386 - mens. 03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19]-[.F19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4" table:formula="of:=SUM([.H2:.H19])" office:value-type="float" office:value="2000" calcext:value-type="float">
            <text:p>2.000,00</text:p>
          </table:table-cell>
          <table:table-cell table:style-name="ce39"/>
          <table:table-cell table:style-name="ce49" table:number-columns-repeated="55"/>
        </table:table-row>
        <table:table-row table:style-name="ro3" table:number-rows-repeated="31980">
          <table:table-cell table:style-name="ce29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29"/>
          <table:table-cell table:style-name="ce36"/>
          <table:table-cell table:style-name="ce41"/>
          <table:table-cell table:style-name="ce49" table:number-columns-repeated="55"/>
        </table:table-row>
        <table:table-row table:style-name="ro3" table:number-rows-repeated="1016566">
          <table:table-cell table:number-columns-repeated="64"/>
        </table:table-row>
        <table:table-row table:style-name="ro4" table:number-rows-repeated="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50.125663796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50.1279727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4-02T14:26:51.000806822</dc:date>
    <dc:language>pt-PT</dc:language>
    <meta:editing-cycles>622</meta:editing-cycles>
    <meta:editing-duration>PT15H49M5S</meta:editing-duration>
    <meta:print-date>2025-11-04T11:44:23.542686100</meta:print-date>
    <meta:document-statistic meta:table-count="1" meta:cell-count="134" meta:object-count="0"/>
    <meta:user-defined meta:name="Info 0"/>
    <meta:user-defined meta:name="Info 1"/>
    <meta:user-defined meta:name="Info 2"/>
    <meta:user-defined meta:name="Info 3"/>
  </office:meta>
</office:document-meta>
</file>