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3 - mens. 02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90" calcext:value-type="float">
            <text:p>490,00</text:p>
          </table:table-cell>
          <table:table-cell table:style-name="ce28" office:value-type="date" office:date-value="2026-03-12" calcext:value-type="date">
            <text:p>12/03/2026</text:p>
          </table:table-cell>
          <table:table-cell table:style-name="ce36" table:formula="of:=[.C9]-[.F9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87 - mens. 03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470" calcext:value-type="float">
            <text:p>47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0])" office:value-type="float" office:value="470" calcext:value-type="float">
            <text:p>47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1.323889321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1.3261413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6:51.669960941</dc:date>
    <dc:language>pt-PT</dc:language>
    <meta:editing-cycles>609</meta:editing-cycles>
    <meta:editing-duration>PT16H7M2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