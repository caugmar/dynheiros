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0-03" calcext:value-type="date">
            <text:p>03/10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17 - mens. 10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1-21" calcext:value-type="date">
            <text:p>21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1 - mens. 11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04" calcext:value-type="date">
            <text:p>04/12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45 - mens. 12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18" calcext:value-type="date">
            <text:p>18/12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59 - mens. 01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6-01-20" calcext:value-type="date">
            <text:p>20/01/2026</text:p>
          </table:table-cell>
          <table:table-cell table:style-name="ce36" table:formula="of:=[.C8]-[.F8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3 - mens. 02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90" calcext:value-type="float">
            <text:p>490,00</text:p>
          </table:table-cell>
          <table:table-cell table:style-name="ce28" office:value-type="date" office:date-value="2026-03-12" calcext:value-type="date">
            <text:p>12/03/2026</text:p>
          </table:table-cell>
          <table:table-cell table:style-name="ce36" table:formula="of:=[.C9]-[.F9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13387 - mens. 03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70" calcext:value-type="float">
            <text:p>470,00</text:p>
          </table:table-cell>
          <table:table-cell table:style-name="ce28" office:value-type="date" office:date-value="2026-05-07" calcext:value-type="date">
            <text:p>07/05/2026</text:p>
          </table:table-cell>
          <table:table-cell table:style-name="ce36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NF 13401 - mens. 04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70" calcext:value-type="float">
            <text:p>470,00</text:p>
          </table:table-cell>
          <table:table-cell table:style-name="ce28" office:value-type="date" office:date-value="2026-05-07" calcext:value-type="date">
            <text:p>07/05/2026</text:p>
          </table:table-cell>
          <table:table-cell table:style-name="ce36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NF 13415 - mens. 05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70" calcext:value-type="float">
            <text:p>470,00</text:p>
          </table:table-cell>
          <table:table-cell table:style-name="ce28" office:value-type="date" office:date-value="2026-06-17" calcext:value-type="date">
            <text:p>17/06/2026</text:p>
          </table:table-cell>
          <table:table-cell table:style-name="ce36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6-30" calcext:value-type="date">
            <text:p>30/06/2026</text:p>
          </table:table-cell>
          <table:table-cell table:style-name="ce33" office:value-type="string" calcext:value-type="string">
            <text:p>NF 13429 - mens. 06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3]-[.F13]" office:value-type="float" office:value="470" calcext:value-type="float">
            <text:p>47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3])" office:value-type="float" office:value="470" calcext:value-type="float">
            <text:p>47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7.880198473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7.8824228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7-01T10:09:08.210810347</dc:date>
    <dc:language>pt-PT</dc:language>
    <meta:editing-cycles>614</meta:editing-cycles>
    <meta:editing-duration>PT16H10M42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