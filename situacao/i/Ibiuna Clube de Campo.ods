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3 - mens. 09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0-03" calcext:value-type="date">
            <text:p>03/10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17 - mens. 10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1-21" calcext:value-type="date">
            <text:p>21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1 - mens. 11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04" calcext:value-type="date">
            <text:p>04/12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45 - mens. 12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18" calcext:value-type="date">
            <text:p>18/12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59 - mens. 01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6-01-20" calcext:value-type="date">
            <text:p>20/01/2026</text:p>
          </table:table-cell>
          <table:table-cell table:style-name="ce36" table:formula="of:=[.C8]-[.F8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13373 - mens. 02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90" calcext:value-type="float">
            <text:p>490,00</text:p>
          </table:table-cell>
          <table:table-cell table:style-name="ce28" office:value-type="date" office:date-value="2026-03-12" calcext:value-type="date">
            <text:p>12/03/2026</text:p>
          </table:table-cell>
          <table:table-cell table:style-name="ce36" table:formula="of:=[.C9]-[.F9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NF 13387 - mens. 03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0]-[.F10]" office:value-type="float" office:value="470" calcext:value-type="float">
            <text:p>47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NF 13401 - mens. 04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1]-[.F11]" office:value-type="float" office:value="470" calcext:value-type="float">
            <text:p>47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1])" office:value-type="float" office:value="940" calcext:value-type="float">
            <text:p>94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2.686346862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2.6885617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30T15:57:32.999463797</dc:date>
    <dc:language>pt-PT</dc:language>
    <meta:editing-cycles>610</meta:editing-cycles>
    <meta:editing-duration>PT16H7M2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