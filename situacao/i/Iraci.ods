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8" office:value-type="string" calcext:value-type="string">
            <text:p>R$</text:p>
          </table:table-cell>
          <table:table-cell table:style-name="ce72"/>
          <table:table-cell table:style-name="ce74" office:value-type="string" calcext:value-type="string">
            <text:p>PAGO</text:p>
          </table:table-cell>
          <table:table-cell table:style-name="ce6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4" office:value-type="string" calcext:value-type="string">
            <text:p>OBS.:</text:p>
          </table:table-cell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NF 6411 - process. 07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8-11" calcext:value-type="date">
            <text:p>11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NF 6420 - process. 08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9-09" calcext:value-type="date">
            <text:p>09/09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NF 6429 - process. 09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0-10" calcext:value-type="date">
            <text:p>10/10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NF 6438 - process. 10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NF 6447 - process. 11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2-10" calcext:value-type="date">
            <text:p>10/12/2025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NF 6456 - process. 12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6-01-09" calcext:value-type="date">
            <text:p>09/01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NF 6465 - process. 01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NF 6474 - process. 02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3-09" calcext:value-type="date">
            <text:p>09/03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NF 6483 - process. 03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4-10" calcext:value-type="date">
            <text:p>10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0])" office:value-type="float" office:value="0" calcext:value-type="float">
            <text:p>-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0:56:55.0701192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0:56:55.077239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06:55</meta:creation-date>
    <dc:date>2026-04-11T10:57:17.947633300</dc:date>
    <meta:print-date>2019-12-10T15:22:29.903000000</meta:print-date>
    <dc:language>pt-PT</dc:language>
    <meta:editing-cycles>591</meta:editing-cycles>
    <meta:editing-duration>P1DT1M6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