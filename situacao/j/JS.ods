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29" calcext:value-type="date">
            <text:p>29/01/2026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5" calcext:value-type="date">
            <text:p>05/03/2026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300" calcext:value-type="float">
            <text:p>30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7" office:value-type="string" calcext:value-type="string">
            <text:p>Mens. 05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7" office:value-type="string" calcext:value-type="string">
            <text:p>Mens. 06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3])" office:value-type="float" office:value="1500" calcext:value-type="float">
            <text:p>1.50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9.798191664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9.8004044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7-01T10:09:10.187263376</dc:date>
    <dc:language>pt-PT</dc:language>
    <meta:editing-cycles>438</meta:editing-cycles>
    <meta:editing-duration>PT13H25M6S</meta:editing-duration>
    <meta:print-date>2019-11-04T10:09:33.513893508</meta:print-date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