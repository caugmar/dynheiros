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29" calcext:value-type="date">
            <text:p>29/01/2026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5" calcext:value-type="date">
            <text:p>05/03/2026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1])" office:value-type="float" office:value="1200" calcext:value-type="float">
            <text:p>1.20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4.597102762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4.5991500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30T15:57:34.925357054</dc:date>
    <dc:language>pt-PT</dc:language>
    <meta:editing-cycles>435</meta:editing-cycles>
    <meta:editing-duration>PT13H23M43S</meta:editing-duration>
    <meta:print-date>2019-11-04T10:09:33.513893508</meta:print-date>
    <meta:document-statistic meta:table-count="1" meta:cell-count="76" meta:object-count="0"/>
    <meta:user-defined meta:name="Info 0"/>
    <meta:user-defined meta:name="Info 1"/>
    <meta:user-defined meta:name="Info 2"/>
    <meta:user-defined meta:name="Info 3"/>
  </office:meta>
</office:document-meta>
</file>