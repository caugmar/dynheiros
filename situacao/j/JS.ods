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08" calcext:value-type="date">
            <text:p>08/01/2026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29" calcext:value-type="date">
            <text:p>29/01/2026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3-05" calcext:value-type="date">
            <text:p>05/03/2026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4-06" calcext:value-type="date">
            <text:p>06/04/2026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4-06" calcext:value-type="date">
            <text:p>06/04/2026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8]-[.F8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0])" office:value-type="float" office:value="900" calcext:value-type="float">
            <text:p>90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3">
          <table:table-cell table:number-columns-repeated="64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30:03.002101900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30:03.00908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34:44</meta:creation-date>
    <dc:date>2026-04-10T16:30:52.338244800</dc:date>
    <dc:language>pt-PT</dc:language>
    <meta:editing-cycles>434</meta:editing-cycles>
    <meta:editing-duration>PT13H23M43S</meta:editing-duration>
    <meta:print-date>2019-11-04T10:09:33.513893508</meta:print-date>
    <meta:document-statistic meta:table-count="1" meta:cell-count="70" meta:object-count="0"/>
    <meta:user-defined meta:name="Info 0"/>
    <meta:user-defined meta:name="Info 1"/>
    <meta:user-defined meta:name="Info 2"/>
    <meta:user-defined meta:name="Info 3"/>
  </office:meta>
</office:document-meta>
</file>