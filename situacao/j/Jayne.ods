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8" style:family="table-cell" style:parent-style-name="Default">
      <style:text-properties fo:font-size="12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3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48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Abertura da firma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08" calcext:value-type="date">
            <text:p>08/04/2026</text:p>
          </table:table-cell>
          <table:table-cell table:style-name="ce44" table:formula="of:=[.C2]-[.F2]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400" calcext:value-type="float">
            <text:p>4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260" calcext:value-type="float">
            <text:p>260,00</text:p>
          </table:table-cell>
          <table:table-cell table:style-name="ce27" office:value-type="date" office:date-value="2026-05-12" calcext:value-type="date">
            <text:p>12/05/2026</text:p>
          </table:table-cell>
          <table:table-cell table:style-name="ce44"/>
          <table:table-cell table:style-name="ce46" office:value-type="string" calcext:value-type="string">
            <text:p>Desconto R$ 140,00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260" calcext:value-type="float">
            <text:p>26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260" calcext:value-type="float">
            <text:p>26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4" table:formula="of:=[.C4]-[.F4]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4])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7"/>
          <table:table-cell table:style-name="ce48" table:number-columns-repeated="55"/>
        </table:table-row>
        <table:table-row table:style-name="ro2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7"/>
          <table:table-cell table:style-name="ce48" table:number-columns-repeated="55"/>
        </table:table-row>
        <table:table-row table:style-name="ro2" table:number-rows-repeated="31976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7"/>
          <table:table-cell table:style-name="ce48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3:27.277406700">00:00:00</text:time></text:span><text:span text:style-name="MT2"><text:time style:data-style-name="N2" text:time-value="09:43:27.277452300">00:00:00</text:time></text:span></text:p>
        </style:region-center>
        <style:region-right>
          <text:p><text:span text:style-name="MT3">Jayne Mariotto Serv. Veterinários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ayne Mariotto Serviços Veterinários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3:27.28879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6T09:43:50.986696100</dc:date>
    <meta:print-date>2020-07-07T14:13:04.434000000</meta:print-date>
    <dc:language>pt-PT</dc:language>
    <meta:editing-cycles>694</meta:editing-cycles>
    <meta:editing-duration>PT20H48M25S</meta:editing-duration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