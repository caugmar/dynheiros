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Abertura da firma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1-07" calcext:value-type="date">
            <text:p>07/1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2-09" calcext:value-type="date">
            <text:p>09/1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6-01-06" calcext:value-type="date">
            <text:p>06/01/2026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Mens. 01/2026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6-02-06" calcext:value-type="date">
            <text:p>06/02/2026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5" office:value-type="string" calcext:value-type="string">
            <text:p>Mens. 02/2026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6-03-09" calcext:value-type="date">
            <text:p>09/03/2026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5" office:value-type="string" calcext:value-type="string">
            <text:p>Mens. 03/2026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6-04-08" calcext:value-type="date">
            <text:p>08/04/2026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5" office:value-type="string" calcext:value-type="string">
            <text:p>Mens. 04/2026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6-05-12" calcext:value-type="date">
            <text:p>12/05/2026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5-31" calcext:value-type="date">
            <text:p>31/05/2026</text:p>
          </table:table-cell>
          <table:table-cell table:style-name="ce55" office:value-type="string" calcext:value-type="string">
            <text:p>Mens. 05/2026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6-06-10" calcext:value-type="date">
            <text:p>10/06/2026</text:p>
          </table:table-cell>
          <table:table-cell table:style-name="ce67" table:formula="of:=[.C13]-[.F1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6-30" calcext:value-type="date">
            <text:p>30/06/2026</text:p>
          </table:table-cell>
          <table:table-cell table:style-name="ce55" office:value-type="string" calcext:value-type="string">
            <text:p>Mens. 06/2026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14]-[.F14]" office:value-type="float" office:value="260" calcext:value-type="float">
            <text:p>26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4])" office:value-type="float" office:value="260" calcext:value-type="float">
            <text:p>26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11.131671042">00:00:00</text:time></text:span><text:span text:style-name="MT2"><text:time style:data-style-name="N2" text:time-value="10:09:11.131695294">00:00:00</text:time></text:span></text:p>
        </style:region-center>
        <style:region-right>
          <text:p><text:span text:style-name="MT3">Jorge Abrão Pinto Vilela Ativ. Vet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brão Pinto Vilela Ativ. Vet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11.13445311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7-01T10:09:11.464115761</dc:date>
    <dc:language>pt-PT</dc:language>
    <meta:editing-cycles>694</meta:editing-cycles>
    <meta:editing-duration>PT20H15M34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