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5-12" calcext:value-type="date">
            <text:p>12/05/2026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6-10" calcext:value-type="date">
            <text:p>10/06/2026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3:58.856638600">00:00:00</text:time></text:span><text:span text:style-name="MT2"><text:time style:data-style-name="N2" text:time-value="09:43:58.8566823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3:58.86701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6T09:44:24.039235400</dc:date>
    <dc:language>pt-PT</dc:language>
    <meta:editing-cycles>693</meta:editing-cycles>
    <meta:editing-duration>PT20H15M34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