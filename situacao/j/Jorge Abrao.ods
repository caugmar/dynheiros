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1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54:09.663681100">00:00:00</text:time></text:span><text:span text:style-name="MT2"><text:time style:data-style-name="N2" text:time-value="16:54:09.6637236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54:09.67417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4:02</meta:creation-date>
    <dc:date>2026-04-10T16:54:44.000726800</dc:date>
    <dc:language>pt-PT</dc:language>
    <meta:editing-cycles>689</meta:editing-cycles>
    <meta:editing-duration>PT20H14M40S</meta:editing-duration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