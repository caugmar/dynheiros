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6-01-06" calcext:value-type="date">
            <text:p>06/01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3-09" calcext:value-type="date">
            <text:p>09/03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5" office:value-type="string" calcext:value-type="string">
            <text:p>Mens. 04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1]-[.F11]" office:value-type="float" office:value="930" calcext:value-type="float">
            <text:p>93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1])" office:value-type="float" office:value="930" calcext:value-type="float">
            <text:p>93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36.468309383">00:00:00</text:time></text:span><text:span text:style-name="MT2"><text:time style:data-style-name="N2" text:time-value="15:57:36.468333260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36.4709998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4-30T15:57:36.766113562</dc:date>
    <meta:print-date>2020-07-07T14:13:04.434000000</meta:print-date>
    <dc:language>pt-PT</dc:language>
    <meta:editing-cycles>690</meta:editing-cycles>
    <meta:editing-duration>PT20H44M44S</meta:editing-duration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