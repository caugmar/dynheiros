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5-12" calcext:value-type="date">
            <text:p>12/05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5" office:value-type="string" calcext:value-type="string">
            <text:p>Mens. 05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6-10" calcext:value-type="date">
            <text:p>10/06/2026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44:35.445473900">00:00:00</text:time></text:span><text:span text:style-name="MT2"><text:time style:data-style-name="N2" text:time-value="09:44:35.4455159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44:35.45610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4:02</meta:creation-date>
    <dc:date>2026-06-16T09:45:09.431696200</dc:date>
    <meta:print-date>2020-07-07T14:13:04.434000000</meta:print-date>
    <dc:language>pt-PT</dc:language>
    <meta:editing-cycles>693</meta:editing-cycles>
    <meta:editing-duration>PT20H50M27S</meta:editing-duration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