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8-08" calcext:value-type="date">
            <text:p>08/08/2025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0-03" calcext:value-type="date">
            <text:p>03/10/2025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0-03" calcext:value-type="date">
            <text:p>03/10/2025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2-05" calcext:value-type="date">
            <text:p>05/12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2-05" calcext:value-type="date">
            <text:p>05/12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6-02-18" calcext:value-type="date">
            <text:p>18/02/2026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6-02-18" calcext:value-type="date">
            <text:p>18/02/2026</text:p>
          </table:table-cell>
          <table:table-cell table:style-name="ce59"/>
          <table:table-cell table:style-name="ce65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9" office:value-type="date" office:date-value="2026-03-30" calcext:value-type="date">
            <text:p>30/03/2026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Mens. 03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9" office:value-type="date" office:date-value="2026-05-18" calcext:value-type="date">
            <text:p>18/05/2026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5" office:value-type="string" calcext:value-type="string">
            <text:p>Mens. 04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9" office:value-type="date" office:date-value="2026-05-18" calcext:value-type="date">
            <text:p>18/05/2026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5-31" calcext:value-type="date">
            <text:p>31/05/2026</text:p>
          </table:table-cell>
          <table:table-cell table:style-name="ce55" office:value-type="string" calcext:value-type="string">
            <text:p>Mens. 05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9" office:value-type="date" office:date-value="2026-06-08" calcext:value-type="date">
            <text:p>08/06/2026</text:p>
          </table:table-cell>
          <table:table-cell table:style-name="ce59" table:formula="of:=[.C12]-[.F1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2])" office:value-type="float" office:value="0" calcext:value-type="float">
            <text:p>-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69">
          <table:table-cell table:number-columns-repeated="64"/>
        </table:table-row>
        <table:table-row table:style-name="ro6" table:number-rows-repeated="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6:03:24.686556900">00:00:00</text:time></text:span><text:span text:style-name="MT2"><text:s/></text:span></text:p>
        </style:region-center>
        <style:region-right>
          <text:p><text:span text:style-name="MT4">José Cícero de Li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Cícero de Lim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6:03:24.693156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34:44</meta:creation-date>
    <dc:date>2026-06-12T16:03:51.627555700</dc:date>
    <dc:language>pt-PT</dc:language>
    <meta:editing-cycles>444</meta:editing-cycles>
    <meta:editing-duration>PT13H43M21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