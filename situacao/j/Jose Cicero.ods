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/>
          <table:table-cell table:style-name="ce65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9" office:value-type="date" office:date-value="2026-03-30" calcext:value-type="date">
            <text:p>30/03/2026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0]-[.F10]" office:value-type="float" office:value="160" calcext:value-type="float">
            <text:p>16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0])" office:value-type="float" office:value="160" calcext:value-type="float">
            <text:p>16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55.109240287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55.1113628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02T14:26:55.451929936</dc:date>
    <dc:language>pt-PT</dc:language>
    <meta:editing-cycles>440</meta:editing-cycles>
    <meta:editing-duration>PT13H42M16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