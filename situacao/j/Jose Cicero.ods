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6-02-18" calcext:value-type="date">
            <text:p>18/02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6-02-18" calcext:value-type="date">
            <text:p>18/02/2026</text:p>
          </table:table-cell>
          <table:table-cell table:style-name="ce59"/>
          <table:table-cell table:style-name="ce65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9" office:value-type="date" office:date-value="2026-03-30" calcext:value-type="date">
            <text:p>30/03/2026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0]-[.F10]" office:value-type="float" office:value="160" calcext:value-type="float">
            <text:p>16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1]-[.F11]" office:value-type="float" office:value="160" calcext:value-type="float">
            <text:p>16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1])" office:value-type="float" office:value="320" calcext:value-type="float">
            <text:p>32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7.050909208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7.0529884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4-30T15:57:37.398564317</dc:date>
    <dc:language>pt-PT</dc:language>
    <meta:editing-cycles>441</meta:editing-cycles>
    <meta:editing-duration>PT13H42M16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