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9-04" calcext:value-type="date">
            <text:p>04/09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0-06" calcext:value-type="date">
            <text:p>06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6-01-12" calcext:value-type="date">
            <text:p>12/01/2026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2-23" calcext:value-type="date">
            <text:p>23/02/2026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3-16" calcext:value-type="date">
            <text:p>16/03/2026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3-27" calcext:value-type="date">
            <text:p>27/03/2026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Mens. 04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1]-[.F11]" office:value-type="float" office:value="210" calcext:value-type="float">
            <text:p>21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1])" office:value-type="float" office:value="210" calcext:value-type="float">
            <text:p>21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6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7.730564366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7.7325942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4-30T15:57:38.075298661</dc:date>
    <dc:language>pt-PT</dc:language>
    <meta:editing-cycles>450</meta:editing-cycles>
    <meta:editing-duration>PT13H27M39S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