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1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2-23" calcext:value-type="date">
            <text:p>23/02/2026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16" calcext:value-type="date">
            <text:p>16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27" calcext:value-type="date">
            <text:p>27/03/2026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5-15" calcext:value-type="date">
            <text:p>15/05/2026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6-05" calcext:value-type="date">
            <text:p>05/06/2026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5" office:value-type="string" calcext:value-type="string">
            <text:p>Mens. 06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3]-[.F13]" office:value-type="float" office:value="210" calcext:value-type="float">
            <text:p>21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3])" office:value-type="float" office:value="210" calcext:value-type="float">
            <text:p>21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3.105810895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3.1078238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7-01T10:09:13.456893083</dc:date>
    <dc:language>pt-PT</dc:language>
    <meta:editing-cycles>454</meta:editing-cycles>
    <meta:editing-duration>PT13H28M5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