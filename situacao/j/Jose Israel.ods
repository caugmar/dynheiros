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6-01-12" calcext:value-type="date">
            <text:p>12/01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2-23" calcext:value-type="date">
            <text:p>23/02/2026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16" calcext:value-type="date">
            <text:p>16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27" calcext:value-type="date">
            <text:p>27/03/2026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0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42:07.917005543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42:07.9190712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02T14:44:33.933155898</dc:date>
    <dc:language>pt-PT</dc:language>
    <meta:editing-cycles>449</meta:editing-cycles>
    <meta:editing-duration>PT13H27M39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