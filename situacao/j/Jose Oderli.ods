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9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number-columns-repeated="55" table:default-cell-style-name="ce56"/>
        <table:table-row table:style-name="ro1">
          <table:table-cell table:style-name="ce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8"/>
          <table:table-cell table:style-name="ce7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0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30" calcext:value-type="date">
            <text:p>30/07/2025</text:p>
          </table:table-cell>
          <table:table-cell table:style-name="ce65" table:formula="of:=[.C2]-[.F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01" calcext:value-type="date">
            <text:p>01/09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0" office:value-type="string" calcext:value-type="string">
            <text:p>Mens. 09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30" calcext:value-type="date">
            <text:p>30/09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0" office:value-type="string" calcext:value-type="string">
            <text:p>Mens. 10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0-30" calcext:value-type="date">
            <text:p>30/10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0" office:value-type="string" calcext:value-type="string">
            <text:p>Mens. 11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01" calcext:value-type="date">
            <text:p>01/12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0" office:value-type="string" calcext:value-type="string">
            <text:p>Mens. 12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30" calcext:value-type="date">
            <text:p>30/12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0" office:value-type="string" calcext:value-type="string">
            <text:p>Mens. 01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2-02" calcext:value-type="date">
            <text:p>02/02/2026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0" office:value-type="string" calcext:value-type="string">
            <text:p>Mens. 02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3-02" calcext:value-type="date">
            <text:p>02/03/2026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3-31" calcext:value-type="date">
            <text:p>31/03/2026</text:p>
          </table:table-cell>
          <table:table-cell table:style-name="ce60" office:value-type="string" calcext:value-type="string">
            <text:p>Mens. 03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3-30" calcext:value-type="date">
            <text:p>30/03/2026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4-30" calcext:value-type="date">
            <text:p>30/04/2026</text:p>
          </table:table-cell>
          <table:table-cell table:style-name="ce60" office:value-type="string" calcext:value-type="string">
            <text:p>Mens. 04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7"/>
          <table:table-cell table:style-name="ce65" table:formula="of:=[.C11]-[.F11]" office:value-type="float" office:value="150" calcext:value-type="float">
            <text:p>150,00</text:p>
          </table:table-cell>
          <table:table-cell table:style-name="ce71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ce78" office:value-type="string" calcext:value-type="string">
            <text:p>TOTAL</text:p>
          </table:table-cell>
          <table:table-cell table:style-name="ce64" table:formula="of:=SUM([.H2:.H11])" office:value-type="float" office:value="150" calcext:value-type="float">
            <text:p>150,00</text:p>
          </table:table-cell>
          <table:table-cell table:style-name="ce70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Default" table:number-columns-repeated="3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Obs.: ao fazer seus pagamentos, por gentileza efetue os depósitos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em nome de <text:span text:style-name="T1">LBM ESCRITÓRIO DE SERVIÇOS IBIÚNA LTDA.,</text:span>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4" office:value-type="string" calcext:value-type="string">
            <text:p>BB c/c 13940-8, agência 0825-7.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3" table:number-rows-repeated="2">
          <table:table-cell table:style-name="ce57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31986">
          <table:table-cell table:style-name="ce58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1016565">
          <table:table-cell table:number-columns-repeated="64"/>
        </table:table-row>
        <table:table-row table:style-name="ro5" table:number-rows-repeated="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8.387076419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8.3891000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4-30T15:57:38.749195875</dc:date>
    <dc:language>pt-PT</dc:language>
    <meta:editing-cycles>448</meta:editing-cycles>
    <meta:editing-duration>PT14H42M34S</meta:editing-duration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