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0" office:value-type="string" calcext:value-type="string">
            <text:p>Mens. 01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2-02" calcext:value-type="date">
            <text:p>02/02/2026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0" office:value-type="string" calcext:value-type="string">
            <text:p>Mens. 02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02" calcext:value-type="date">
            <text:p>02/03/2026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0" office:value-type="string" calcext:value-type="string">
            <text:p>Mens. 03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30" calcext:value-type="date">
            <text:p>30/03/2026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0" office:value-type="string" calcext:value-type="string">
            <text:p>Mens. 04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4-30" calcext:value-type="date">
            <text:p>30/04/2026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5-31" calcext:value-type="date">
            <text:p>31/05/2026</text:p>
          </table:table-cell>
          <table:table-cell table:style-name="ce60" office:value-type="string" calcext:value-type="string">
            <text:p>Mens. 05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6-01" calcext:value-type="date">
            <text:p>01/06/2026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12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34:11.054397500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34:11.06084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4:44</meta:creation-date>
    <dc:date>2026-06-01T11:34:32.673161800</dc:date>
    <dc:language>pt-PT</dc:language>
    <meta:editing-cycles>451</meta:editing-cycles>
    <meta:editing-duration>PT14H43M9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