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6cm" fo:break-before="page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8" table:default-cell-style-name="ce14"/>
        <table:table-column table:style-name="co9" table:number-columns-repeated="55" table:default-cell-style-name="ce1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22" calcext:value-type="date">
            <text:p>22/01/2026</text:p>
          </table:table-cell>
          <table:table-cell table:style-name="ce87" table:formula="of:=[.C2]-[.F2]" office:value-type="float" office:value="0" calcext:value-type="float">
            <text:p>-</text:p>
          </table:table-cell>
          <table:table-cell table:style-name="ce98" office:value-type="string" calcext:value-type="string">
            <text:p>(obs. 12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9" calcext:value-type="float">
            <text:p>139,00</text:p>
          </table:table-cell>
          <table:table-cell table:style-name="ce104" office:value-type="date" office:date-value="2026-02-19" calcext:value-type="date">
            <text:p>19/02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2 e 13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Rest. mens. 08/2024 (A.C.)</text:p>
          </table:table-cell>
          <table:table-cell table:style-name="ce87" office:value-type="float" office:value="61" calcext:value-type="float">
            <text:p>6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1" calcext:value-type="float">
            <text:p>61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table:formula="of:=[.C4]-[.F4]" office:value-type="float" office:value="0" calcext:value-type="float">
            <text:p>-</text:p>
          </table:table-cell>
          <table:table-cell table:style-name="ce98" office:value-type="string" calcext:value-type="string">
            <text:p>(obs. 14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6]-[.F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7]-[.F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9]-[.F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11]-[.F1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13]-[.F1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14]-[.F1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13" calcext:value-type="date">
            <text:p>13/01/2026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3-11" calcext:value-type="date">
            <text:p>11/03/2026</text:p>
          </table:table-cell>
          <table:table-cell table:style-name="ce87" table:formula="of:=[.C16]-[.F1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7" calcext:value-type="float">
            <text:p>17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table:formula="of:=[.C17]-[.F17]" office:value-type="float" office:value="183" calcext:value-type="float">
            <text:p>183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8]-[.F1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Mens. 01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Mens. 02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Mens. 03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23])" office:value-type="float" office:value="1383" calcext:value-type="float">
            <text:p>1.383,00</text:p>
          </table:table-cell>
          <table:table-cell table:style-name="ce97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6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8"/>
          <table:table-cell table:style-name="ce20" office:value-type="string" calcext:value-type="string">
            <text:p>(obs. 12) 12/01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3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1/01 – gás – R$ 450,00 (x1) = </text:p>
          </table:table-cell>
          <table:table-cell table:style-name="ce31" office:value-type="currency" office:currency="BRL" office:value="450" calcext:value-type="currency">
            <text:p>R$ 450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2/01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29:.C31])" office:value-type="currency" office:currency="BRL" office:value="515" calcext:value-type="currency">
            <text:p>R$ 51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3) 05/02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9/02 – água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3:.C34])" office:value-type="currency" office:currency="BRL" office:value="65" calcext:value-type="currency">
            <text:p>R$ 6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4) 03/03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7/03 – água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6/03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6:.C38])" office:value-type="currency" office:currency="BRL" office:value="78" calcext:value-type="currency">
            <text:p>R$ 78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 table:number-rows-repeated="2">
          <table:table-cell table:style-name="Default" table:number-columns-repeated="3"/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Default" table:number-columns-repeated="3"/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 table:number-rows-repeated="31966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3">
          <table:table-cell table:number-columns-repeated="64"/>
        </table:table-row>
        <table:table-row table:style-name="ro5" table:number-rows-repeated="2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42:11.473534805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42:11.4777349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02T14:56:11.179936276</dc:date>
    <dc:language>pt-PT</dc:language>
    <meta:editing-cycles>478</meta:editing-cycles>
    <meta:editing-duration>PT14H45M54S</meta:editing-duration>
    <meta:print-date>2026-04-02T14:51:47.863273223</meta:print-date>
    <meta:document-statistic meta:table-count="1" meta:cell-count="184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antes do corte de 02/04/2026." VL:creator="" dc:date-time="2026-04-02T14:48:39"/>
</VL:version-list>
</file>