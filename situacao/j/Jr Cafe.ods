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8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6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Mens. 05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2]-[.F2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Mens. 06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3]-[.F3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Mens. 07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4]-[.F4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Mens. 08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5]-[.F5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Mens. 09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6]-[.F6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Mens. 10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7]-[.F7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Mens. 11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8]-[.F8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Mens. 12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9]-[.F9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Mens. 01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0]-[.F10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Mens. 02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1]-[.F11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3-31" calcext:value-type="date">
            <text:p>31/03/2026</text:p>
          </table:table-cell>
          <table:table-cell table:style-name="ce21" office:value-type="string" calcext:value-type="string">
            <text:p>Mens. 03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2]-[.F12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4-30" calcext:value-type="date">
            <text:p>30/04/2026</text:p>
          </table:table-cell>
          <table:table-cell table:style-name="ce21" office:value-type="string" calcext:value-type="string">
            <text:p>Mens. 04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3]-[.F13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style-name="ce35" office:value-type="string" calcext:value-type="string">
            <text:p>TOTAL</text:p>
          </table:table-cell>
          <table:table-cell table:style-name="ce34" table:formula="of:=SUM([.H2:.H13])" office:value-type="float" office:value="4280" calcext:value-type="float">
            <text:p>4.28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2">
          <table:table-cell table:style-name="ce14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1985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3.930982091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3.9329618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30T15:57:34.289454981</dc:date>
    <meta:print-date>2019-10-31T18:04:07.913029257</meta:print-date>
    <dc:language>pt-PT</dc:language>
    <meta:editing-cycles>575</meta:editing-cycles>
    <meta:editing-duration>P1DT8H36M1S</meta:editing-duration>
    <meta:document-statistic meta:table-count="1" meta:cell-count="82" meta:object-count="0"/>
    <meta:user-defined meta:name="Info 0"/>
    <meta:user-defined meta:name="Info 1"/>
    <meta:user-defined meta:name="Info 2"/>
    <meta:user-defined meta:name="Info 3"/>
  </office:meta>
</office:document-meta>
</file>