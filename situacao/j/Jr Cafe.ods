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Mens. 02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1]-[.F11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Mens. 03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2]-[.F12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Mens. 04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3]-[.F13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5-31" calcext:value-type="date">
            <text:p>31/05/2026</text:p>
          </table:table-cell>
          <table:table-cell table:style-name="ce21" office:value-type="string" calcext:value-type="string">
            <text:p>Mens. 05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4]-[.F14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4])" office:value-type="float" office:value="4650" calcext:value-type="float">
            <text:p>4.65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31.847492087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31.8495147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6-01T10:21:32.212582502</dc:date>
    <meta:print-date>2019-10-31T18:04:07.913029257</meta:print-date>
    <dc:language>pt-PT</dc:language>
    <meta:editing-cycles>576</meta:editing-cycles>
    <meta:editing-duration>P1DT8H36M1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