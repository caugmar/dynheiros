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2-05" calcext:value-type="date">
            <text:p>05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3-05" calcext:value-type="date">
            <text:p>05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4-08" calcext:value-type="date">
            <text:p>08/04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1]-[.F11]" office:value-type="float" office:value="270" calcext:value-type="float">
            <text:p>2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1])" office:value-type="float" office:value="270" calcext:value-type="float">
            <text:p>27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9.757601449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9.7599238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40.067186210</dc:date>
    <meta:print-date>2019-12-18T08:56:40.082000000</meta:print-date>
    <dc:language>pt-PT</dc:language>
    <meta:editing-cycles>681</meta:editing-cycles>
    <meta:editing-duration>PT21H53M27S</meta:editing-duration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