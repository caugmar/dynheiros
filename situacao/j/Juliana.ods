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8-04" calcext:value-type="date">
            <text:p>04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1-06" calcext:value-type="date">
            <text:p>06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2-08" calcext:value-type="date">
            <text:p>08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1-09" calcext:value-type="date">
            <text:p>09/01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2-05" calcext:value-type="date">
            <text:p>05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3-05" calcext:value-type="date">
            <text:p>05/03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4" office:value-type="string" calcext:value-type="string">
            <text:p>Mens. 04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5-07" calcext:value-type="date">
            <text:p>07/05/2026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4" office:value-type="string" calcext:value-type="string">
            <text:p>Mens. 05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6-05" calcext:value-type="date">
            <text:p>05/06/2026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6-30" calcext:value-type="date">
            <text:p>30/06/2026</text:p>
          </table:table-cell>
          <table:table-cell table:style-name="ce54" office:value-type="string" calcext:value-type="string">
            <text:p>Mens. 06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3]-[.F13]" office:value-type="float" office:value="270" calcext:value-type="float">
            <text:p>27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3])" office:value-type="float" office:value="270" calcext:value-type="float">
            <text:p>27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15.208258740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15.2104311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7-01T10:09:15.564202557</dc:date>
    <meta:print-date>2019-12-18T08:56:40.082000000</meta:print-date>
    <dc:language>pt-PT</dc:language>
    <meta:editing-cycles>685</meta:editing-cycles>
    <meta:editing-duration>PT21H54M32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