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2-18" calcext:value-type="date">
            <text:p>18/02/2026</text:p>
          </table:table-cell>
          <table:table-cell table:style-name="ce67" table:formula="of:=[.C8]-[.F8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3-11" calcext:value-type="date">
            <text:p>11/03/2026</text:p>
          </table:table-cell>
          <table:table-cell table:style-name="ce67" table:formula="of:=[.C9]-[.F9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0]-[.F10]" office:value-type="float" office:value="320" calcext:value-type="float">
            <text:p>3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0])" office:value-type="float" office:value="360" calcext:value-type="float">
            <text:p>3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8.736133756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8.7383460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02T14:26:59.060926948</dc:date>
    <meta:print-date>2019-12-18T08:56:40.082000000</meta:print-date>
    <dc:language>pt-PT</dc:language>
    <meta:editing-cycles>680</meta:editing-cycles>
    <meta:editing-duration>PT21H34M4S</meta:editing-duration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