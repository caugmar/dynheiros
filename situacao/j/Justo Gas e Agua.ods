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8-14" calcext:value-type="date">
            <text:p>14/08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9-12" calcext:value-type="date">
            <text:p>12/09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2-16" calcext:value-type="date">
            <text:p>16/12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1-20" calcext:value-type="date">
            <text:p>20/01/2026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2-18" calcext:value-type="date">
            <text:p>18/02/2026</text:p>
          </table:table-cell>
          <table:table-cell table:style-name="ce67" table:formula="of:=[.C8]-[.F8]" office:value-type="float" office:value="20" calcext:value-type="float">
            <text:p>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3-11" calcext:value-type="date">
            <text:p>11/03/2026</text:p>
          </table:table-cell>
          <table:table-cell table:style-name="ce67" table:formula="of:=[.C9]-[.F9]" office:value-type="float" office:value="20" calcext:value-type="float">
            <text:p>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4" office:value-type="string" calcext:value-type="string">
            <text:p>Mens. 03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 office:value-type="string" calcext:value-type="string">
            <text:p>pg</text:p>
          </table:table-cell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4-20" calcext:value-type="date">
            <text:p>20/04/2026</text:p>
          </table:table-cell>
          <table:table-cell table:style-name="ce67" table:formula="of:=[.C10]-[.F10]" office:value-type="float" office:value="20" calcext:value-type="float">
            <text:p>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4" office:value-type="string" calcext:value-type="string">
            <text:p>Mens. 04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5-11" calcext:value-type="date">
            <text:p>11/05/2026</text:p>
          </table:table-cell>
          <table:table-cell table:style-name="ce67" table:formula="of:=[.C11]-[.F11]" office:value-type="float" office:value="20" calcext:value-type="float">
            <text:p>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54" office:value-type="string" calcext:value-type="string">
            <text:p>Mens. 05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6-08" calcext:value-type="date">
            <text:p>08/06/2026</text:p>
          </table:table-cell>
          <table:table-cell table:style-name="ce67" table:formula="of:=[.C12]-[.F12]" office:value-type="float" office:value="20" calcext:value-type="float">
            <text:p>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2])" office:value-type="float" office:value="100" calcext:value-type="float">
            <text:p>10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5:55:23.802629800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55:23.809067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14:02</meta:creation-date>
    <dc:date>2026-06-12T15:56:00.908529900</dc:date>
    <meta:print-date>2019-12-18T08:56:40.082000000</meta:print-date>
    <dc:language>pt-PT</dc:language>
    <meta:editing-cycles>685</meta:editing-cycles>
    <meta:editing-duration>PT21H35M43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