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0-15" calcext:value-type="date">
            <text:p>15/10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1-17" calcext:value-type="date">
            <text:p>17/11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2-15" calcext:value-type="date">
            <text:p>15/1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1-15" calcext:value-type="date">
            <text:p>15/01/2026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2-18" calcext:value-type="date">
            <text:p>18/02/2026</text:p>
          </table:table-cell>
          <table:table-cell table:style-name="ce47" table:formula="of:=[.C8]-[.F8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3-19" calcext:value-type="date">
            <text:p>19/03/2026</text:p>
          </table:table-cell>
          <table:table-cell table:style-name="ce47" table:formula="of:=[.C9]-[.F9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4-20" calcext:value-type="date">
            <text:p>20/04/2026</text:p>
          </table:table-cell>
          <table:table-cell table:style-name="ce47" table:formula="of:=[.C10]-[.F10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11]-[.F11]" office:value-type="float" office:value="200" calcext:value-type="float">
            <text:p>20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1])" office:value-type="float" office:value="260" calcext:value-type="float">
            <text:p>26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1.007918585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30">00/00/0000</text:date></text:span><text:span text:style-name="MT6"><text:s/>- </text:span><text:span text:style-name="MT6"><text:time style:data-style-name="N2" text:time-value="15:57:41.009263708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1.01285096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4-30T15:57:41.351074879</dc:date>
    <dc:language>pt-PT</dc:language>
    <meta:editing-cycles>704</meta:editing-cycles>
    <meta:editing-duration>PT21H26M21S</meta:editing-duration>
    <meta:document-statistic meta:table-count="1" meta:cell-count="81" meta:object-count="0"/>
    <meta:user-defined meta:name="Info 0"/>
    <meta:user-defined meta:name="Info 1"/>
    <meta:user-defined meta:name="Info 2"/>
    <meta:user-defined meta:name="Info 3"/>
  </office:meta>
</office:document-meta>
</file>