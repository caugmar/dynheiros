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2-18" calcext:value-type="date">
            <text:p>18/02/2026</text:p>
          </table:table-cell>
          <table:table-cell table:style-name="ce47" table:formula="of:=[.C8]-[.F8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3-19" calcext:value-type="date">
            <text:p>19/03/2026</text:p>
          </table:table-cell>
          <table:table-cell table:style-name="ce47" table:formula="of:=[.C9]-[.F9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4-20" calcext:value-type="date">
            <text:p>20/04/2026</text:p>
          </table:table-cell>
          <table:table-cell table:style-name="ce47" table:formula="of:=[.C10]-[.F10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5-20" calcext:value-type="date">
            <text:p>20/05/2026</text:p>
          </table:table-cell>
          <table:table-cell table:style-name="ce47" table:formula="of:=[.C11]-[.F11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6-19" calcext:value-type="date">
            <text:p>19/06/2026</text:p>
          </table:table-cell>
          <table:table-cell table:style-name="ce47" table:formula="of:=[.C12]-[.F12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Mens. 06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3]-[.F13]" office:value-type="float" office:value="200" calcext:value-type="float">
            <text:p>2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300" calcext:value-type="float">
            <text:p>3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6.554769271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9:16.556147174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6.5598040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6.901198517</dc:date>
    <dc:language>pt-PT</dc:language>
    <meta:editing-cycles>708</meta:editing-cycles>
    <meta:editing-duration>PT21H27M44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