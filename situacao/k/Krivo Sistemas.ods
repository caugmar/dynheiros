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0-15" calcext:value-type="date">
            <text:p>15/10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1-17" calcext:value-type="date">
            <text:p>17/11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2-15" calcext:value-type="date">
            <text:p>15/1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1-15" calcext:value-type="date">
            <text:p>15/01/2026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2-18" calcext:value-type="date">
            <text:p>18/02/2026</text:p>
          </table:table-cell>
          <table:table-cell table:style-name="ce47" table:formula="of:=[.C8]-[.F8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3-19" calcext:value-type="date">
            <text:p>19/03/2026</text:p>
          </table:table-cell>
          <table:table-cell table:style-name="ce47" table:formula="of:=[.C9]-[.F9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10]-[.F10]" office:value-type="float" office:value="200" calcext:value-type="float">
            <text:p>20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0])" office:value-type="float" office:value="240" calcext:value-type="float">
            <text:p>24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59.344900755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02">00/00/0000</text:date></text:span><text:span text:style-name="MT6"><text:s/>- </text:span><text:span text:style-name="MT6"><text:time style:data-style-name="N2" text:time-value="14:26:59.346323819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59.3499272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4-02T14:26:59.692588252</dc:date>
    <dc:language>pt-PT</dc:language>
    <meta:editing-cycles>702</meta:editing-cycles>
    <meta:editing-duration>PT21H26M7S</meta:editing-duration>
    <meta:document-statistic meta:table-count="1" meta:cell-count="74" meta:object-count="0"/>
    <meta:user-defined meta:name="Info 0"/>
    <meta:user-defined meta:name="Info 1"/>
    <meta:user-defined meta:name="Info 2"/>
    <meta:user-defined meta:name="Info 3"/>
  </office:meta>
</office:document-meta>
</file>