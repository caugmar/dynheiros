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7" office:value-type="string" calcext:value-type="string">
            <text:p>pg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480" calcext:value-type="float">
            <text:p>48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6]-[.F6]" office:value-type="float" office:value="-110" calcext:value-type="float">
            <text:p>(110,00)</text:p>
          </table:table-cell>
          <table:table-cell table:style-name="ce23" office:value-type="string" calcext:value-type="string" table:number-columns-spanned="1" table:number-rows-spanned="2">
            <text:p>PG – R$ 610,00</text:p>
            <text:p>10/2025 – 110,00</text:p>
            <text:p>11/2025 – 370,00</text:p>
            <text:p>12/2025 – 13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130" calcext:value-type="float">
            <text:p>13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7]-[.F7]" office:value-type="float" office:value="240" calcext:value-type="float">
            <text:p>24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2-28" calcext:value-type="date">
            <text:p>28/02/2026</text:p>
          </table:table-cell>
          <table:table-cell table:style-name="ce45" office:value-type="string" calcext:value-type="string">
            <text:p>Mens. 02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9]-[.F9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3-31" calcext:value-type="date">
            <text:p>31/03/2026</text:p>
          </table:table-cell>
          <table:table-cell table:style-name="ce45" office:value-type="string" calcext:value-type="string">
            <text:p>Mens. 03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0]-[.F10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4-30" calcext:value-type="date">
            <text:p>30/04/2026</text:p>
          </table:table-cell>
          <table:table-cell table:style-name="ce45" office:value-type="string" calcext:value-type="string">
            <text:p>Mens. 04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1]-[.F11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1])" office:value-type="float" office:value="1760" calcext:value-type="float">
            <text:p>1.76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1.612329059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1.6146223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30T15:57:41.945276127</dc:date>
    <dc:language>pt-PT</dc:language>
    <meta:editing-cycles>673</meta:editing-cycles>
    <meta:editing-duration>P2DT8H17M52S</meta:editing-duration>
    <meta:print-date>2024-06-04T14:05:15.806000000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