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0]-[.F10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0])" office:value-type="float" office:value="1100" calcext:value-type="float">
            <text:p>1.1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0.657052090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0.6591725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02T14:27:01.036219504</dc:date>
    <meta:print-date>2019-10-31T18:11:28.685825074</meta:print-date>
    <dc:language>pt-PT</dc:language>
    <meta:editing-cycles>585</meta:editing-cycles>
    <meta:editing-duration>P1DT9H5M3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