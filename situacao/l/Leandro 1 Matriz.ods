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2-09" calcext:value-type="date">
            <text:p>09/02/2026</text:p>
          </table:table-cell>
          <table:table-cell table:style-name="ce47" table:formula="of:=[.C8]-[.F8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4 - mens. 02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7" table:formula="of:=[.C9]-[.F9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8 - mens. 03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7" table:formula="of:=[.C10]-[.F10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2 - mens. 04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5-07" calcext:value-type="date">
            <text:p>07/05/2026</text:p>
          </table:table-cell>
          <table:table-cell table:style-name="ce47" table:formula="of:=[.C11]-[.F11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16 - mens. 05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7" table:formula="of:=[.C12]-[.F12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NF 13430 - mens. 06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3]-[.F13]" office:value-type="float" office:value="1200" calcext:value-type="float">
            <text:p>1.2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1450" calcext:value-type="float">
            <text:p>1.4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8.535868802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8.5387273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9:18.879991052</dc:date>
    <dc:language>pt-PT</dc:language>
    <meta:editing-cycles>672</meta:editing-cycles>
    <meta:editing-duration>P1DT5H6M57S</meta:editing-duration>
    <meta:print-date>2020-06-16T10:17:24.261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