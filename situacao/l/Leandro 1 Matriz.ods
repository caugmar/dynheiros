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6 - mens. 07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8-11" calcext:value-type="date">
            <text:p>11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90 - mens. 08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304 - mens. 09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0-14" calcext:value-type="date">
            <text:p>14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8 - mens. 10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32 - mens. 1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2-10" calcext:value-type="date">
            <text:p>10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46 - mens. 1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1-12" calcext:value-type="date">
            <text:p>12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13360 - mens. 01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2-09" calcext:value-type="date">
            <text:p>09/02/2026</text:p>
          </table:table-cell>
          <table:table-cell table:style-name="ce47" table:formula="of:=[.C8]-[.F8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13374 - mens. 02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3-09" calcext:value-type="date">
            <text:p>09/03/2026</text:p>
          </table:table-cell>
          <table:table-cell table:style-name="ce47" table:formula="of:=[.C9]-[.F9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NF 13388 - mens. 03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4-09" calcext:value-type="date">
            <text:p>09/04/2026</text:p>
          </table:table-cell>
          <table:table-cell table:style-name="ce47" table:formula="of:=[.C10]-[.F10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NF 13402 - mens. 04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7" table:formula="of:=[.C11]-[.F11]" office:value-type="float" office:value="1200" calcext:value-type="float">
            <text:p>1.20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1])" office:value-type="float" office:value="1350" calcext:value-type="float">
            <text:p>1.350,00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42.840703499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42.8435020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4-30T15:57:43.201513093</dc:date>
    <dc:language>pt-PT</dc:language>
    <meta:editing-cycles>668</meta:editing-cycles>
    <meta:editing-duration>P1DT5H5M54S</meta:editing-duration>
    <meta:print-date>2020-06-16T10:17:24.261000000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