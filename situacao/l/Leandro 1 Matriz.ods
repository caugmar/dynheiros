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0-14" calcext:value-type="date">
            <text:p>14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8 - mens. 10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2 - mens. 1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2-10" calcext:value-type="date">
            <text:p>10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6 - mens. 1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60 - mens. 01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2-09" calcext:value-type="date">
            <text:p>09/02/2026</text:p>
          </table:table-cell>
          <table:table-cell table:style-name="ce47" table:formula="of:=[.C8]-[.F8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74 - mens. 02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7" table:formula="of:=[.C9]-[.F9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88 - mens. 03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4-09" calcext:value-type="date">
            <text:p>09/04/2026</text:p>
          </table:table-cell>
          <table:table-cell table:style-name="ce47" table:formula="of:=[.C10]-[.F10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13402 - mens. 04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5-07" calcext:value-type="date">
            <text:p>07/05/2026</text:p>
          </table:table-cell>
          <table:table-cell table:style-name="ce47" table:formula="of:=[.C11]-[.F11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NF 13416 - mens. 05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6-10" calcext:value-type="date">
            <text:p>10/06/2026</text:p>
          </table:table-cell>
          <table:table-cell table:style-name="ce47" table:formula="of:=[.C12]-[.F12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2])" office:value-type="float" office:value="250" calcext:value-type="float">
            <text:p>25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27:21.294532000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27:21.306278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1:56</meta:creation-date>
    <dc:date>2026-06-12T16:27:50.546545200</dc:date>
    <dc:language>pt-PT</dc:language>
    <meta:editing-cycles>671</meta:editing-cycles>
    <meta:editing-duration>P1DT5H6M57S</meta:editing-duration>
    <meta:print-date>2020-06-16T10:17:24.261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