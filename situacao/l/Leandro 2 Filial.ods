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2-25" calcext:value-type="date">
            <text:p>25/02/2026</text:p>
          </table:table-cell>
          <table:table-cell table:style-name="ce68" table:formula="of:=[.C8]-[.F8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NF 13375 - mens. 02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3-16" calcext:value-type="date">
            <text:p>16/03/2026</text:p>
          </table:table-cell>
          <table:table-cell table:style-name="ce68" table:formula="of:=[.C9]-[.F9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NF 13389 - mens. 03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10]-[.F10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NF 13403 - mens. 04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11]-[.F11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11])" office:value-type="float" office:value="2400" calcext:value-type="float">
            <text:p>2.40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3.520750647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3.5228375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43.889313127</dc:date>
    <meta:print-date>2019-11-08T11:10:54.224000451</meta:print-date>
    <dc:language>pt-PT</dc:language>
    <meta:editing-cycles>662</meta:editing-cycles>
    <meta:editing-duration>P1DT5H59M56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