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8 - mens. 07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25" calcext:value-type="date">
            <text:p>25/07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92 - mens. 08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25" calcext:value-type="date">
            <text:p>25/08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NF 13306 - mens. 09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26" calcext:value-type="date">
            <text:p>26/09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NF 13320 - mens. 10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0-27" calcext:value-type="date">
            <text:p>27/10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NF 13334 - mens. 11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1-25" calcext:value-type="date">
            <text:p>25/11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NF 13348 - mens. 12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24" calcext:value-type="date">
            <text:p>24/12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NF 13362 - mens. 01/2026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1-26" calcext:value-type="date">
            <text:p>26/01/2026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6-02-28" calcext:value-type="date">
            <text:p>28/02/2026</text:p>
          </table:table-cell>
          <table:table-cell table:style-name="ce59" office:value-type="string" calcext:value-type="string">
            <text:p>NF 13376 - mens. 02/2026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2-25" calcext:value-type="date">
            <text:p>25/02/2026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6-03-31" calcext:value-type="date">
            <text:p>31/03/2026</text:p>
          </table:table-cell>
          <table:table-cell table:style-name="ce59" office:value-type="string" calcext:value-type="string">
            <text:p>NF 13390 - mens. 03/2026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3-23" calcext:value-type="date">
            <text:p>23/03/2026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10])" office:value-type="float" office:value="0" calcext:value-type="float">
            <text:p>-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57:26.167309349">00:00:00</text:time></text:span><text:span text:style-name="MT2"><text:time style:data-style-name="N2" text:time-value="14:57:26.167331609">00:00:00</text:time></text:span></text:p>
        </style:region-center>
        <style:region-right>
          <text:p><text:span text:style-name="MT3">Lionsoft</text:span></text:p>
          <text:p><text:span text:style-name="MT2">Felipe - Tel.: 3241-6060 / 99701-3655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ionsoft</text:span></text:p>
          <text:p><text:span text:style-name="MT4">jessica@lionsoft.com.br - 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57:26.17115848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4-02T15:02:11.648731564</dc:date>
    <dc:language>pt-PT</dc:language>
    <meta:editing-cycles>685</meta:editing-cycles>
    <meta:editing-duration>P1DT11H35M52S</meta:editing-duration>
    <meta:print-date>2022-07-01T10:31:27.249000000</meta:print-date>
    <meta:document-statistic meta:table-count="1" meta:cell-count="82" meta:object-count="0"/>
    <meta:user-defined meta:name="Info 0"/>
    <meta:user-defined meta:name="Info 1"/>
    <meta:user-defined meta:name="Info 2"/>
    <meta:user-defined meta:name="Info 3"/>
  </office:meta>
</office:document-meta>
</file>