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8 - mens. 07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7-25" calcext:value-type="date">
            <text:p>25/07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2 - mens. 08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8-25" calcext:value-type="date">
            <text:p>25/08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6 - mens. 09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9-26" calcext:value-type="date">
            <text:p>26/09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20 - mens. 10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0-27" calcext:value-type="date">
            <text:p>27/10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4 - mens. 11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1-25" calcext:value-type="date">
            <text:p>25/11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8 - mens. 12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2-24" calcext:value-type="date">
            <text:p>24/12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2 - mens. 01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6 - mens. 02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2-25" calcext:value-type="date">
            <text:p>25/02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90 - mens. 03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4 - mens. 04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1]-[.F11]" office:value-type="float" office:value="400" calcext:value-type="float">
            <text:p>4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1])" office:value-type="float" office:value="400" calcext:value-type="float">
            <text:p>40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4.208007583">00:00:00</text:time></text:span><text:span text:style-name="MT2"><text:time style:data-style-name="N2" text:time-value="15:57:44.208032313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4.2108542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44.563122859</dc:date>
    <dc:language>pt-PT</dc:language>
    <meta:editing-cycles>686</meta:editing-cycles>
    <meta:editing-duration>P1DT11H35M52S</meta:editing-duration>
    <meta:print-date>2022-07-01T10:31:27.249000000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