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8 - mens. 07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7-25" calcext:value-type="date">
            <text:p>25/07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2 - mens. 08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8-25" calcext:value-type="date">
            <text:p>25/08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6 - mens. 09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9-26" calcext:value-type="date">
            <text:p>26/09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20 - mens. 10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10-27" calcext:value-type="date">
            <text:p>27/10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34 - mens. 11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11-25" calcext:value-type="date">
            <text:p>25/11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48 - mens. 12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12-24" calcext:value-type="date">
            <text:p>24/12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62 - mens. 01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76 - mens. 02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2-25" calcext:value-type="date">
            <text:p>25/02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13390 - mens. 03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3-23" calcext:value-type="date">
            <text:p>23/03/2026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13404 - mens. 04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4-27" calcext:value-type="date">
            <text:p>27/04/2026</text:p>
          </table:table-cell>
          <table:table-cell table:style-name="ce47"/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NF 13418 - mens. 05/2026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5-25" calcext:value-type="date">
            <text:p>25/05/2026</text:p>
          </table:table-cell>
          <table:table-cell table:style-name="ce47"/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2])" office:value-type="float" office:value="0" calcext:value-type="float">
            <text:p>-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3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4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4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1:32:04.357171300">00:00:00</text:time></text:span><text:span text:style-name="MT2"><text:time style:data-style-name="N2" text:time-value="11:32:04.357213400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1:32:04.368265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31:56</meta:creation-date>
    <dc:date>2026-06-01T11:32:43.233513700</dc:date>
    <dc:language>pt-PT</dc:language>
    <meta:editing-cycles>688</meta:editing-cycles>
    <meta:editing-duration>P1DT11H36M31S</meta:editing-duration>
    <meta:print-date>2022-07-01T10:31:27.249000000</meta:print-date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