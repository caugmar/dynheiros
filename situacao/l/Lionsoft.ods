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78 - mens. 07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07-25" calcext:value-type="date">
            <text:p>25/07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92 - mens. 08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08-25" calcext:value-type="date">
            <text:p>25/08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306 - mens. 09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09-26" calcext:value-type="date">
            <text:p>26/09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13320 - mens. 10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10-27" calcext:value-type="date">
            <text:p>27/10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13334 - mens. 11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11-25" calcext:value-type="date">
            <text:p>25/11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13348 - mens. 12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12-24" calcext:value-type="date">
            <text:p>24/12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NF 13362 - mens. 01/2026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1-26" calcext:value-type="date">
            <text:p>26/01/2026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NF 13376 - mens. 02/2026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2-25" calcext:value-type="date">
            <text:p>25/02/2026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NF 13390 - mens. 03/2026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3-23" calcext:value-type="date">
            <text:p>23/03/2026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NF 13404 - mens. 04/2026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4-27" calcext:value-type="date">
            <text:p>27/04/2026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34" office:value-type="string" calcext:value-type="string">
            <text:p>NF 13418 - mens. 05/2026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5-25" calcext:value-type="date">
            <text:p>25/05/2026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6-30" calcext:value-type="date">
            <text:p>30/06/2026</text:p>
          </table:table-cell>
          <table:table-cell table:style-name="ce34" office:value-type="string" calcext:value-type="string">
            <text:p>NF 13432 - mens. 06/2026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6-24" calcext:value-type="date">
            <text:p>24/06/2026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13])" office:value-type="float" office:value="0" calcext:value-type="float">
            <text:p>-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3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4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4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32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2:21:38.357822958">00:00:00</text:time></text:span><text:span text:style-name="MT2"><text:time style:data-style-name="N2" text:time-value="12:21:38.357845400">00:00:00</text:time></text:span></text:p>
        </style:region-center>
        <style:region-right>
          <text:p><text:span text:style-name="MT3">Lionsoft</text:span></text:p>
          <text:p><text:span text:style-name="MT2">Felipe - Tel.: 3241-6060 / 99701-3655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ionsoft</text:span></text:p>
          <text:p><text:span text:style-name="MT4">jessica@lionsoft.com.br - 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2:21:38.3618011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7-01T12:22:33.381651252</dc:date>
    <dc:language>pt-PT</dc:language>
    <meta:editing-cycles>690</meta:editing-cycles>
    <meta:editing-duration>P1DT11H37M26S</meta:editing-duration>
    <meta:print-date>2022-07-01T10:31:27.249000000</meta:print-date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