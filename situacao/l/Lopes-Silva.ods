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8" office:value-type="string" calcext:value-type="string">
            <text:p>Mens. 1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8" office:value-type="string" calcext:value-type="string">
            <text:p>Mens. 1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8" office:value-type="string" calcext:value-type="string">
            <text:p>Mens. 01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8" office:value-type="string" calcext:value-type="string">
            <text:p>Mens. 02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8" office:value-type="string" calcext:value-type="string">
            <text:p>Mens. 03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0]-[.F2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20])" office:value-type="float" office:value="14820" calcext:value-type="float">
            <text:p>14.82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3.252877528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3.2550476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02T14:27:03.588819968</dc:date>
    <dc:language>pt-PT</dc:language>
    <meta:editing-cycles>687</meta:editing-cycles>
    <meta:editing-duration>P1DT15H7M1S</meta:editing-duration>
    <meta:print-date>2019-11-27T10:23:54.118000000</meta:print-date>
    <meta:document-statistic meta:table-count="1" meta:cell-count="124" meta:object-count="0"/>
    <meta:user-defined meta:name="Info 0"/>
    <meta:user-defined meta:name="Info 1"/>
    <meta:user-defined meta:name="Info 2"/>
    <meta:user-defined meta:name="Info 3"/>
  </office:meta>
</office:document-meta>
</file>