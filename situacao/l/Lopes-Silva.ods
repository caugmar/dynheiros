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8" office:value-type="string" calcext:value-type="string">
            <text:p>Mens. 1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8" office:value-type="string" calcext:value-type="string">
            <text:p>Mens. 1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8" office:value-type="string" calcext:value-type="string">
            <text:p>Mens. 01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8" office:value-type="string" calcext:value-type="string">
            <text:p>Mens. 02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8" office:value-type="string" calcext:value-type="string">
            <text:p>Mens. 03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0]-[.F2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8" office:value-type="string" calcext:value-type="string">
            <text:p>Mens. 04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1]-[.F2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8" office:value-type="string" calcext:value-type="string">
            <text:p>Mens. 05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2]-[.F2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8" office:value-type="string" calcext:value-type="string">
            <text:p>Mens. 06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3]-[.F2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23])" office:value-type="float" office:value="17160" calcext:value-type="float">
            <text:p>17.160,00</text:p>
          </table:table-cell>
          <table:table-cell table:style-name="ce47"/>
          <table:table-cell table:style-name="ce80" table:number-columns-repeated="55"/>
        </table:table-row>
        <table:table-row table:style-name="ro2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3" table:number-rows-repeated="335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0.503431219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0.5057100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0:09:20.885792229</dc:date>
    <dc:language>pt-PT</dc:language>
    <meta:editing-cycles>691</meta:editing-cycles>
    <meta:editing-duration>P1DT15H8M42S</meta:editing-duration>
    <meta:print-date>2019-11-27T10:23:54.118000000</meta:print-date>
    <meta:document-statistic meta:table-count="1" meta:cell-count="142" meta:object-count="0"/>
    <meta:user-defined meta:name="Info 0"/>
    <meta:user-defined meta:name="Info 1"/>
    <meta:user-defined meta:name="Info 2"/>
    <meta:user-defined meta:name="Info 3"/>
  </office:meta>
</office:document-meta>
</file>