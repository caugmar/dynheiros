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8-15" calcext:value-type="date">
            <text:p>15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9-10" calcext:value-type="date">
            <text:p>10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17" calcext:value-type="date">
            <text:p>17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2-09" calcext:value-type="date">
            <text:p>09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6-02-18" calcext:value-type="date">
            <text:p>18/02/2026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80" calcext:value-type="float">
            <text:p>580,00</text:p>
          </table:table-cell>
          <table:table-cell table:style-name="ce2" office:value-type="date" office:date-value="2026-02-18" calcext:value-type="date">
            <text:p>18/02/2026</text:p>
          </table:table-cell>
          <table:table-cell table:style-name="ce20" table:formula="of:=[.C8]-[.F8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9]-[.F9]" office:value-type="float" office:value="580" calcext:value-type="float">
            <text:p>580,00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7" office:value-type="string" calcext:value-type="string">
            <text:p>Mens. 03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10]-[.F10]" office:value-type="float" office:value="580" calcext:value-type="float">
            <text:p>580,00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 office:value-type="string" calcext:value-type="string">
            <text:p>TOTAL</text:p>
          </table:table-cell>
          <table:table-cell table:style-name="ce36" table:formula="of:=SUM([.H2:.H10])" office:value-type="float" office:value="1160" calcext:value-type="float">
            <text:p>1.160,00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">
          <table:table-cell table:style-name="ce3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1979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3519">
          <table:table-cell table:style-name="ce5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3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03.901298266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03.9034964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0:38</meta:creation-date>
    <dc:date>2026-04-02T14:27:04.277481731</dc:date>
    <dc:language>pt-PT</dc:language>
    <meta:editing-cycles>629</meta:editing-cycles>
    <meta:editing-duration>P1DT15H56M35S</meta:editing-duration>
    <meta:document-statistic meta:table-count="1" meta:cell-count="71" meta:object-count="0"/>
    <meta:user-defined meta:name="Info 0"/>
    <meta:user-defined meta:name="Info 1"/>
    <meta:user-defined meta:name="Info 2"/>
    <meta:user-defined meta:name="Info 3"/>
  </office:meta>
</office:document-meta>
</file>