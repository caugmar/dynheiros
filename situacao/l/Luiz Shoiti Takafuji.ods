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2-09" calcext:value-type="date">
            <text:p>09/02/2026</text:p>
          </table:table-cell>
          <table:table-cell table:style-name="ce57" table:formula="of:=[.C8]-[.F8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3-05" calcext:value-type="date">
            <text:p>05/03/2026</text:p>
          </table:table-cell>
          <table:table-cell table:style-name="ce57" table:formula="of:=[.C9]-[.F9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4-07" calcext:value-type="date">
            <text:p>07/04/2026</text:p>
          </table:table-cell>
          <table:table-cell table:style-name="ce57" table:formula="of:=[.C10]-[.F10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5"/>
          <table:table-cell table:style-name="ce57" table:formula="of:=[.C11]-[.F11]" office:value-type="float" office:value="480" calcext:value-type="float">
            <text:p>480,00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11])" office:value-type="float" office:value="480" calcext:value-type="float">
            <text:p>480,00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6.179216157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6.1811948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6-04-30T15:57:46.488860800</dc:date>
    <dc:language>pt-PT</dc:language>
    <meta:editing-cycles>583</meta:editing-cycles>
    <meta:editing-duration>P1DT6H16M59S</meta:editing-duration>
    <meta:print-date>2019-12-26T17:35:16.413881726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