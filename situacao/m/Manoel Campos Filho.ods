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53" office:value-type="string" calcext:value-type="string">
            <text:p>NF 13363 - mens. 01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53" office:value-type="string" calcext:value-type="string">
            <text:p>NF 13377 - mens. 02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6]-[.F16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53" office:value-type="string" calcext:value-type="string">
            <text:p>NF 13391 - mens. 03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7]-[.F17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7])" office:value-type="float" office:value="5950" calcext:value-type="float">
            <text:p>5.95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05.209598306">00:00:00</text:time></text:span><text:span text:style-name="MT2"><text:time style:data-style-name="N2" text:time-value="14:27:05.209621208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05.2130300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4-02T14:27:05.571746111</dc:date>
    <dc:language>pt-PT</dc:language>
    <meta:editing-cycles>708</meta:editing-cycles>
    <meta:editing-duration>P1DT10H14M38S</meta:editing-duration>
    <meta:print-date>2020-06-04T09:49:02.903000000</meta:print-date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