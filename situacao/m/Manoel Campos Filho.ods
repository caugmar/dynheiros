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3]-[.F3]" office:value-type="float" office:value="170" calcext:value-type="float">
            <text:p>170,00</text:p>
          </table:table-cell>
          <table:covered-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4]-[.F4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5]-[.F5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53" office:value-type="string" calcext:value-type="string">
            <text:p>NF 13335 - mens. 11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53" office:value-type="string" calcext:value-type="string">
            <text:p>NF 13349 - mens. 12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53" office:value-type="string" calcext:value-type="string">
            <text:p>NF 13363 - mens. 01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53" office:value-type="string" calcext:value-type="string">
            <text:p>NF 13377 - mens. 02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6]-[.F16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53" office:value-type="string" calcext:value-type="string">
            <text:p>NF 13391 - mens. 03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7]-[.F17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53" office:value-type="string" calcext:value-type="string">
            <text:p>NF 13405 - mens. 04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8]-[.F18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8])" office:value-type="float" office:value="6230" calcext:value-type="float">
            <text:p>6.23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6.788970916">00:00:00</text:time></text:span><text:span text:style-name="MT2"><text:time style:data-style-name="N2" text:time-value="15:57:46.788995393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6.7916809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4-30T15:57:47.209307383</dc:date>
    <dc:language>pt-PT</dc:language>
    <meta:editing-cycles>709</meta:editing-cycles>
    <meta:editing-duration>P1DT10H14M38S</meta:editing-duration>
    <meta:print-date>2020-06-04T09:49:02.903000000</meta:print-date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