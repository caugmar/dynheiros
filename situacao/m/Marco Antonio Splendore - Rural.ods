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39" table:formula="of:=[.C6]-[.F6]" office:value-type="float" office:value="-10" calcext:value-type="float">
            <text:p>(1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6-01-07" calcext:value-type="date">
            <text:p>07/01/2026</text:p>
          </table:table-cell>
          <table:table-cell table:style-name="ce39" table:formula="of:=[.C7]-[.F7]" office:value-type="float" office:value="10" calcext:value-type="float">
            <text:p>1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2-09" calcext:value-type="date">
            <text:p>09/02/2026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3-06" calcext:value-type="date">
            <text:p>06/03/2026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4-07" calcext:value-type="date">
            <text:p>07/04/2026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11]-[.F11]" office:value-type="float" office:value="200" calcext:value-type="float">
            <text:p>20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1])" office:value-type="float" office:value="200" calcext:value-type="float">
            <text:p>20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7.535330952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7.5367856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6-04-30T15:57:47.888866286</dc:date>
    <meta:print-date>2020-01-06T16:40:18.085000000</meta:print-date>
    <dc:language>pt-PT</dc:language>
    <meta:editing-cycles>409</meta:editing-cycles>
    <meta:editing-duration>P1DT5H31M3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