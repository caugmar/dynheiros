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39" table:formula="of:=[.C6]-[.F6]" office:value-type="float" office:value="-10" calcext:value-type="float">
            <text:p>(1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6-01-07" calcext:value-type="date">
            <text:p>07/01/2026</text:p>
          </table:table-cell>
          <table:table-cell table:style-name="ce39" table:formula="of:=[.C7]-[.F7]" office:value-type="float" office:value="10" calcext:value-type="float">
            <text:p>1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2-09" calcext:value-type="date">
            <text:p>09/02/2026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3-06" calcext:value-type="date">
            <text:p>06/03/2026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4-07" calcext:value-type="date">
            <text:p>07/04/2026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5-07" calcext:value-type="date">
            <text:p>07/05/2026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5" office:value-type="string" calcext:value-type="string">
            <text:p>Mens. 05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6-08" calcext:value-type="date">
            <text:p>08/06/2026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5" office:value-type="string" calcext:value-type="string">
            <text:p>Mens. 06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13]-[.F13]" office:value-type="float" office:value="200" calcext:value-type="float">
            <text:p>20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3])" office:value-type="float" office:value="200" calcext:value-type="float">
            <text:p>20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3.222799098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3.2242052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6-07-01T10:09:23.573239612</dc:date>
    <meta:print-date>2020-01-06T16:40:18.085000000</meta:print-date>
    <dc:language>pt-PT</dc:language>
    <meta:editing-cycles>413</meta:editing-cycles>
    <meta:editing-duration>P1DT5H32M47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