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1-07" calcext:value-type="date">
            <text:p>07/11/2025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12-05" calcext:value-type="date">
            <text:p>05/12/2025</text:p>
          </table:table-cell>
          <table:table-cell table:style-name="ce39" table:formula="of:=[.C6]-[.F6]" office:value-type="float" office:value="-10" calcext:value-type="float">
            <text:p>(1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6-01-07" calcext:value-type="date">
            <text:p>07/01/2026</text:p>
          </table:table-cell>
          <table:table-cell table:style-name="ce39" table:formula="of:=[.C7]-[.F7]" office:value-type="float" office:value="10" calcext:value-type="float">
            <text:p>1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2-09" calcext:value-type="date">
            <text:p>09/02/2026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3-06" calcext:value-type="date">
            <text:p>06/03/2026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Mens. 03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4-07" calcext:value-type="date">
            <text:p>07/04/2026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10])" office:value-type="float" office:value="0" calcext:value-type="float">
            <text:p>-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1:18:38.107687900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18:38.112938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25:03</meta:creation-date>
    <dc:date>2026-04-11T11:19:09.416898900</dc:date>
    <meta:print-date>2020-01-06T16:40:18.085000000</meta:print-date>
    <dc:language>pt-PT</dc:language>
    <meta:editing-cycles>408</meta:editing-cycles>
    <meta:editing-duration>P1DT5H31M3S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