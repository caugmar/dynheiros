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Mens. 08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0-03" calcext:value-type="date">
            <text:p>03/10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Mens. 09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Mens. 10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Mens. 1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2-08" calcext:value-type="date">
            <text:p>08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Mens. 1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Mens. 01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0" office:value-type="string" calcext:value-type="string">
            <text:p>Mens. 02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3-03" calcext:value-type="date">
            <text:p>03/03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0" office:value-type="string" calcext:value-type="string">
            <text:p>Mens. 03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4-06" calcext:value-type="date">
            <text:p>06/04/2026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30" office:value-type="string" calcext:value-type="string">
            <text:p>Mens. 04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11]-[.F11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1])" office:value-type="float" office:value="150" calcext:value-type="float">
            <text:p>150,00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8.147196517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6-04-30">00/00/0000</text:date></text:span><text:span text:style-name="MT5"><text:s/>- </text:span><text:span text:style-name="MT5"><text:time style:data-style-name="N2" text:time-value="15:57:48.148346164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8.1517417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4-30T15:57:48.486555189</dc:date>
    <dc:language>pt-PT</dc:language>
    <meta:editing-cycles>720</meta:editing-cycles>
    <meta:editing-duration>P1DT7H18M54S</meta:editing-duration>
    <meta:print-date>2020-06-04T09:49:02.903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