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Mens. 1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2-08" calcext:value-type="date">
            <text:p>08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Mens. 1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Mens. 01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Mens. 02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3-03" calcext:value-type="date">
            <text:p>03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Mens. 03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4-06" calcext:value-type="date">
            <text:p>06/04/2026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0])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45:02.715730400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6-04-10">00/00/0000</text:date></text:span><text:span text:style-name="MT5"><text:s/>- </text:span><text:span text:style-name="MT5"><text:time style:data-style-name="N2" text:time-value="16:45:02.72132560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45:02.73015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24:01</meta:creation-date>
    <dc:date>2026-04-10T16:45:13.188485600</dc:date>
    <dc:language>pt-PT</dc:language>
    <meta:editing-cycles>719</meta:editing-cycles>
    <meta:editing-duration>P1DT7H18M54S</meta:editing-duration>
    <meta:print-date>2020-06-04T09:49:02.903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