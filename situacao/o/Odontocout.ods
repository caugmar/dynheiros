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" office:value-type="date" office:date-value="2025-12-16" calcext:value-type="date">
            <text:p>16/12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6]-[.F6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1" office:value-type="string" calcext:value-type="string">
            <text:p>Mens. 11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7]-[.F7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1" office:value-type="string" calcext:value-type="string">
            <text:p>Mens. 12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8]-[.F8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1" office:value-type="string" calcext:value-type="string">
            <text:p>Mens. 01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9]-[.F9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1" office:value-type="string" calcext:value-type="string">
            <text:p>Mens. 02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0]-[.F10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1" office:value-type="string" calcext:value-type="string">
            <text:p>Mens. 03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1]-[.F11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1" office:value-type="string" calcext:value-type="string">
            <text:p>Mens. 04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2]-[.F12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2])" office:value-type="float" office:value="4800" calcext:value-type="float">
            <text:p>4.8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8.819570290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8.8215105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30T15:57:49.140498667</dc:date>
    <meta:print-date>2025-09-02T10:58:11.993056878</meta:print-date>
    <dc:language>pt-PT</dc:language>
    <meta:editing-cycles>640</meta:editing-cycles>
    <meta:editing-duration>PT16H33M17S</meta:editing-duration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