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8" office:value-type="string" calcext:value-type="string">
            <text:p>Mens. 10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1-03" calcext:value-type="date">
            <text:p>03/1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8" office:value-type="string" calcext:value-type="string">
            <text:p>Mens. 1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2-01" calcext:value-type="date">
            <text:p>01/1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8" office:value-type="string" calcext:value-type="string">
            <text:p>Mens. 1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6-01-04" calcext:value-type="date">
            <text:p>04/01/2026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8" office:value-type="string" calcext:value-type="string">
            <text:p>Mens. 01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2-02" calcext:value-type="date">
            <text:p>02/02/2026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8" office:value-type="string" calcext:value-type="string">
            <text:p>Mens. 02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9]-[.F9]" office:value-type="float" office:value="270" calcext:value-type="float">
            <text:p>27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8" office:value-type="string" calcext:value-type="string">
            <text:p>Mens. 03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0]-[.F10]" office:value-type="float" office:value="270" calcext:value-type="float">
            <text:p>27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0])" office:value-type="float" office:value="540" calcext:value-type="float">
            <text:p>54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7.829974725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7.8327601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02T14:27:08.197837912</dc:date>
    <meta:print-date>2016-08-26T13:19:57</meta:print-date>
    <dc:language>pt-PT</dc:language>
    <meta:editing-cycles>600</meta:editing-cycles>
    <meta:editing-duration>PT15H24M18S</meta:editing-duration>
    <meta:printed-by>Carlos Augusto Marcicano</meta:printed-by>
    <meta:document-statistic meta:table-count="1" meta:cell-count="71" meta:object-count="0"/>
    <meta:user-defined meta:name="Info 0"/>
    <meta:user-defined meta:name="Info 1"/>
    <meta:user-defined meta:name="Info 2"/>
    <meta:user-defined meta:name="Info 3"/>
  </office:meta>
</office:document-meta>
</file>