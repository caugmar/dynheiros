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2-02" calcext:value-type="date">
            <text:p>02/02/2026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8" office:value-type="string" calcext:value-type="string">
            <text:p>Mens. 02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9]-[.F9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3-31" calcext:value-type="date">
            <text:p>31/03/2026</text:p>
          </table:table-cell>
          <table:table-cell table:style-name="ce48" office:value-type="string" calcext:value-type="string">
            <text:p>Mens. 03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0]-[.F10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4-30" calcext:value-type="date">
            <text:p>30/04/2026</text:p>
          </table:table-cell>
          <table:table-cell table:style-name="ce48" office:value-type="string" calcext:value-type="string">
            <text:p>Mens. 04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1]-[.F11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1])" office:value-type="float" office:value="810" calcext:value-type="float">
            <text:p>81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49.424568854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49.4273521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4-30T15:57:49.828712937</dc:date>
    <meta:print-date>2016-08-26T13:19:57</meta:print-date>
    <dc:language>pt-PT</dc:language>
    <meta:editing-cycles>601</meta:editing-cycles>
    <meta:editing-duration>PT15H24M18S</meta:editing-duration>
    <meta:printed-by>Carlos Augusto Marcicano</meta:printed-by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