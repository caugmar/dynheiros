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1]-[.F11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2])" office:value-type="float" office:value="50" calcext:value-type="float">
            <text:p>5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8.507489976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8.5096239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02T14:27:08.853715990</dc:date>
    <meta:print-date>2019-11-25T11:09:39.366250752</meta:print-date>
    <dc:language>pt-PT</dc:language>
    <meta:editing-cycles>634</meta:editing-cycles>
    <meta:editing-duration>PT16H29M23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