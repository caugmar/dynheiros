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6-03-06" calcext:value-type="date">
            <text:p>06/03/2026</text:p>
          </table:table-cell>
          <table:table-cell table:style-name="ce18" table:formula="of:=[.C11]-[.F11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Mens. 03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2]-[.F1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6" office:value-type="string" calcext:value-type="string">
            <text:p>Mens. 04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3]-[.F1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3])" office:value-type="float" office:value="100" calcext:value-type="float">
            <text:p>1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0.131461898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0.1334017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30T15:57:50.506435511</dc:date>
    <meta:print-date>2019-11-25T11:09:39.366250752</meta:print-date>
    <dc:language>pt-PT</dc:language>
    <meta:editing-cycles>635</meta:editing-cycles>
    <meta:editing-duration>PT16H29M23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