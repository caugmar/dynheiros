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1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NF 6412 - process. 07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NF 6421 - process. 08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9-05" calcext:value-type="date">
            <text:p>05/09/2025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NF 6430 - process. 09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0-08" calcext:value-type="date">
            <text:p>08/10/2025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NF 6439 - process. 10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1-12" calcext:value-type="date">
            <text:p>12/11/2025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0" office:value-type="string" calcext:value-type="string">
            <text:p>NF 6448 - process. 1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0" office:value-type="string" calcext:value-type="string">
            <text:p>NF 6457 - process. 1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6-01-06" calcext:value-type="date">
            <text:p>06/01/2026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0" office:value-type="string" calcext:value-type="string">
            <text:p>NF 6466 - process. 01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90" calcext:value-type="float">
            <text:p>490,00</text:p>
          </table:table-cell>
          <table:table-cell table:style-name="ce24" office:value-type="date" office:date-value="2026-02-04" calcext:value-type="date">
            <text:p>04/02/2026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30" office:value-type="string" calcext:value-type="string">
            <text:p>NF 6475 - process. 02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90" calcext:value-type="float">
            <text:p>490,00</text:p>
          </table:table-cell>
          <table:table-cell table:style-name="ce24" office:value-type="date" office:date-value="2026-03-05" calcext:value-type="date">
            <text:p>05/03/2026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30" office:value-type="string" calcext:value-type="string">
            <text:p>NF 6484 - process. 03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90" calcext:value-type="float">
            <text:p>490,00</text:p>
          </table:table-cell>
          <table:table-cell table:style-name="ce24" office:value-type="date" office:date-value="2026-04-09" calcext:value-type="date">
            <text:p>09/04/2026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30" office:value-type="string" calcext:value-type="string">
            <text:p>NF 6493 - process. 04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90" calcext:value-type="float">
            <text:p>490,00</text:p>
          </table:table-cell>
          <table:table-cell table:style-name="ce24" office:value-type="date" office:date-value="2026-05-13" calcext:value-type="date">
            <text:p>13/05/2026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5-31" calcext:value-type="date">
            <text:p>31/05/2026</text:p>
          </table:table-cell>
          <table:table-cell table:style-name="ce30" office:value-type="string" calcext:value-type="string">
            <text:p>NF 6502 - process. 05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90" calcext:value-type="float">
            <text:p>490,00</text:p>
          </table:table-cell>
          <table:table-cell table:style-name="ce24" office:value-type="date" office:date-value="2026-06-08" calcext:value-type="date">
            <text:p>08/06/2026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6-30" calcext:value-type="date">
            <text:p>30/06/2026</text:p>
          </table:table-cell>
          <table:table-cell table:style-name="ce30" office:value-type="string" calcext:value-type="string">
            <text:p>NF 6511 - process. 06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4"/>
          <table:table-cell table:style-name="ce34" table:formula="of:=[.C13]-[.F13]" office:value-type="float" office:value="490" calcext:value-type="float">
            <text:p>490,00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13])" office:value-type="float" office:value="490" calcext:value-type="float">
            <text:p>490,00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  <number:text>,</number:text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time-style style:name="N134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27.329605760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27.33295199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7-01T10:09:27.712613404</dc:date>
    <dc:language>pt-PT</dc:language>
    <meta:editing-cycles>553</meta:editing-cycles>
    <meta:editing-duration>PT13H32M28S</meta:editing-duration>
    <meta:print-date>2020-01-09T15:25:59.983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