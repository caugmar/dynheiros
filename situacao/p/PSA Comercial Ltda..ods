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ext-properties fo:font-size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3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55" table:default-cell-style-name="ce28"/>
        <table:table-row table:style-name="ro1">
          <table:table-cell table:style-name="ce1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NF 6412 - process. 07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NF 6421 - process. 08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9-05" calcext:value-type="date">
            <text:p>05/09/2025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0" office:value-type="string" calcext:value-type="string">
            <text:p>NF 6430 - process. 09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0-08" calcext:value-type="date">
            <text:p>08/10/2025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0" office:value-type="string" calcext:value-type="string">
            <text:p>NF 6439 - process. 10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1-12" calcext:value-type="date">
            <text:p>12/11/2025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30" office:value-type="string" calcext:value-type="string">
            <text:p>NF 6448 - process. 11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2-05" calcext:value-type="date">
            <text:p>05/12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30" office:value-type="string" calcext:value-type="string">
            <text:p>NF 6457 - process. 12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6-01-06" calcext:value-type="date">
            <text:p>06/01/2026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30" office:value-type="string" calcext:value-type="string">
            <text:p>NF 6466 - process. 01/2026</text:p>
          </table:table-cell>
          <table:table-cell table:style-name="ce34" office:value-type="float" office:value="490" calcext:value-type="float">
            <text:p>49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90" calcext:value-type="float">
            <text:p>490,00</text:p>
          </table:table-cell>
          <table:table-cell table:style-name="ce24" office:value-type="date" office:date-value="2026-02-04" calcext:value-type="date">
            <text:p>04/02/2026</text:p>
          </table:table-cell>
          <table:table-cell table:style-name="ce34" table:formula="of:=[.C8]-[.F8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6-02-28" calcext:value-type="date">
            <text:p>28/02/2026</text:p>
          </table:table-cell>
          <table:table-cell table:style-name="ce30" office:value-type="string" calcext:value-type="string">
            <text:p>NF 6475 - process. 02/2026</text:p>
          </table:table-cell>
          <table:table-cell table:style-name="ce34" office:value-type="float" office:value="490" calcext:value-type="float">
            <text:p>49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90" calcext:value-type="float">
            <text:p>490,00</text:p>
          </table:table-cell>
          <table:table-cell table:style-name="ce24" office:value-type="date" office:date-value="2026-03-05" calcext:value-type="date">
            <text:p>05/03/2026</text:p>
          </table:table-cell>
          <table:table-cell table:style-name="ce34" table:formula="of:=[.C9]-[.F9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6-03-31" calcext:value-type="date">
            <text:p>31/03/2026</text:p>
          </table:table-cell>
          <table:table-cell table:style-name="ce30" office:value-type="string" calcext:value-type="string">
            <text:p>NF 6484 - process. 03/2026</text:p>
          </table:table-cell>
          <table:table-cell table:style-name="ce34" office:value-type="float" office:value="490" calcext:value-type="float">
            <text:p>490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34" office:value-type="float" office:value="0" calcext:value-type="float">
            <text:p>-</text:p>
          </table:table-cell>
          <table:table-cell table:style-name="ce24"/>
          <table:table-cell table:style-name="ce34" table:formula="of:=[.C10]-[.F10]" office:value-type="float" office:value="490" calcext:value-type="float">
            <text:p>490,00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5" table:number-columns-repeated="6"/>
          <table:table-cell table:style-name="ce41" office:value-type="string" calcext:value-type="string">
            <text:p>TOTAL</text:p>
          </table:table-cell>
          <table:table-cell table:style-name="ce33" table:formula="of:=SUM([.H2:.H10])" office:value-type="float" office:value="490" calcext:value-type="float">
            <text:p>490,00</text:p>
          </table:table-cell>
          <table:table-cell table:style-name="ce38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7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2">
          <table:table-cell table:style-name="ce26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4"/>
          <table:table-cell table:number-columns-repeated="55"/>
        </table:table-row>
        <table:table-row table:style-name="ro2" table:number-rows-repeated="31983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  <number:text>,</number:text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/>
    </number:date-style>
    <number:time-style style:name="N134">
      <number:minutes number:style="long"/>
      <number:text>:</number:text>
      <number:seconds number:style="long"/>
    </number:time-style>
    <number:number-style style:name="N136P0" style:volatile="true">
      <number:number number:decimal-places="2" number:min-decimal-places="2" number:min-integer-digits="1" number:grouping="true"/>
    </number:number-style>
    <number:number-style style:name="N13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7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7:09.803645703">00:00:00</text:time></text:span><text:span text:style-name="MT2"><text:s/></text:span></text:p>
        </style:region-center>
        <style:region-right>
          <text:p><text:span text:style-name="MT4">PSA Comercial Ltda.</text:span></text:p>
          <text:p><text:span text:style-name="MT2">Aley/Pedrico - Tel.: 3241-2174 / 3241-20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SA Comercial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PSA Comercial Ltda.</text:span></text:p>
          <text:p><text:span text:style-name="MT7">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7:09.80689716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4-02T14:27:10.178145714</dc:date>
    <dc:language>pt-PT</dc:language>
    <meta:editing-cycles>547</meta:editing-cycles>
    <meta:editing-duration>PT13H30M37S</meta:editing-duration>
    <meta:print-date>2020-01-09T15:25:59.983000000</meta:print-date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