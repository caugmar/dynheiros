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NF 6475 - process. 02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3-05" calcext:value-type="date">
            <text:p>05/03/2026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0" office:value-type="string" calcext:value-type="string">
            <text:p>NF 6484 - process. 03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0" office:value-type="string" calcext:value-type="string">
            <text:p>NF 6493 - process. 04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1]-[.F11]" office:value-type="float" office:value="490" calcext:value-type="float">
            <text:p>49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1])" office:value-type="float" office:value="490" calcext:value-type="float">
            <text:p>49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1.459021777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1.4621397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30T15:57:51.821868133</dc:date>
    <dc:language>pt-PT</dc:language>
    <meta:editing-cycles>549</meta:editing-cycles>
    <meta:editing-duration>PT13H31M24S</meta:editing-duration>
    <meta:print-date>2020-01-09T15:25:59.983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