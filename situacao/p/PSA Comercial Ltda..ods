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6-01-06" calcext:value-type="date">
            <text:p>06/01/2026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NF 6466 - process. 01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NF 6475 - process. 02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3-05" calcext:value-type="date">
            <text:p>05/03/2026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NF 6484 - process. 03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4-09" calcext:value-type="date">
            <text:p>09/04/2026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0" office:value-type="string" calcext:value-type="string">
            <text:p>NF 6493 - process. 04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5-13" calcext:value-type="date">
            <text:p>13/05/2026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30" office:value-type="string" calcext:value-type="string">
            <text:p>NF 6502 - process. 05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6-08" calcext:value-type="date">
            <text:p>08/06/2026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2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31:48.79120240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31:48.80425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6:32</meta:creation-date>
    <dc:date>2026-06-12T16:32:23.984733900</dc:date>
    <dc:language>pt-PT</dc:language>
    <meta:editing-cycles>552</meta:editing-cycles>
    <meta:editing-duration>PT13H32M28S</meta:editing-duration>
    <meta:print-date>2020-01-09T15:25:59.983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