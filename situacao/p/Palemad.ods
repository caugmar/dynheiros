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1-07" calcext:value-type="date">
            <text:p>07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2-05" calcext:value-type="date">
            <text:p>05/02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3-05" calcext:value-type="date">
            <text:p>05/03/2026</text:p>
          </table:table-cell>
          <table:table-cell table:style-name="ce52"/>
          <table:table-cell table:style-name="ce76" office:value-type="string" calcext:value-type="string">
            <text:p>Desconto 3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80" calcext:value-type="float">
            <text:p>680,00</text:p>
          </table:table-cell>
          <table:table-cell table:style-name="ce31" office:value-type="date" office:date-value="2026-04-06" calcext:value-type="date">
            <text:p>06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0])" office:value-type="float" office:value="0" calcext:value-type="float">
            <text:p>-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28:16.583730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28:16.585771900">00:00:00</text:time></text:span><text:span text:style-name="MT2"><text:time style:data-style-name="N2" text:time-value="16:28:16.5858134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10">00/00/0000</text:date><text:s/>- <text:time style:data-style-name="N2" text:time-value="16:28:16.5911957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00-10-16T12:57:25</meta:creation-date>
    <dc:date>2026-04-10T16:29:03.372071300</dc:date>
    <meta:print-date>2020-10-05T15:55:44.962000000</meta:print-date>
    <dc:language>pt-PT</dc:language>
    <meta:editing-cycles>715</meta:editing-cycles>
    <meta:editing-duration>PT10H16M17S</meta:editing-duration>
    <meta:document-statistic meta:table-count="1" meta:cell-count="75" meta:object-count="0"/>
    <meta:user-defined meta:name="Info 0"/>
    <meta:user-defined meta:name="Info 1"/>
    <meta:user-defined meta:name="Info 2"/>
    <meta:user-defined meta:name="Info 3"/>
  </office:meta>
</office:document-meta>
</file>