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1-07" calcext:value-type="date">
            <text:p>07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2-05" calcext:value-type="date">
            <text:p>05/02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3-05" calcext:value-type="date">
            <text:p>05/03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4-06" calcext:value-type="date">
            <text:p>06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37" office:value-type="string" calcext:value-type="string">
            <text:p>Mens. 04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5-05" calcext:value-type="date">
            <text:p>05/05/2026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5-31" calcext:value-type="date">
            <text:p>31/05/2026</text:p>
          </table:table-cell>
          <table:table-cell table:style-name="ce37" office:value-type="string" calcext:value-type="string">
            <text:p>Mens. 05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6-05" calcext:value-type="date">
            <text:p>05/06/2026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2])" office:value-type="float" office:value="0" calcext:value-type="float">
            <text:p>-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48:17.880097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48:17.882019000">00:00:00</text:time></text:span><text:span text:style-name="MT2"><text:time style:data-style-name="N2" text:time-value="15:48:17.8820592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6-12">00/00/0000</text:date><text:s/>- <text:time style:data-style-name="N2" text:time-value="15:48:17.8881099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00-10-16T12:57:25</meta:creation-date>
    <dc:date>2026-06-12T15:48:50.901007400</dc:date>
    <meta:print-date>2020-10-05T15:55:44.962000000</meta:print-date>
    <dc:language>pt-PT</dc:language>
    <meta:editing-cycles>719</meta:editing-cycles>
    <meta:editing-duration>PT10H17M17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