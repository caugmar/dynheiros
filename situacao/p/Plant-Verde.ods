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Mens. 03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4-16" calcext:value-type="date">
            <text:p>16/04/2026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4-30" calcext:value-type="date">
            <text:p>30/04/2026</text:p>
          </table:table-cell>
          <table:table-cell table:style-name="ce57" office:value-type="string" calcext:value-type="string">
            <text:p>Mens. 04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1]-[.F11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5-31" calcext:value-type="date">
            <text:p>31/05/2026</text:p>
          </table:table-cell>
          <table:table-cell table:style-name="ce57" office:value-type="string" calcext:value-type="string">
            <text:p>Mens. 05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2]-[.F12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6-30" calcext:value-type="date">
            <text:p>30/06/2026</text:p>
          </table:table-cell>
          <table:table-cell table:style-name="ce57" office:value-type="string" calcext:value-type="string">
            <text:p>Mens. 06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3]-[.F13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3])" office:value-type="float" office:value="1320" calcext:value-type="float">
            <text:p>1.32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9.9441965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9.945422866">00:00:00</text:time></text:span><text:span text:style-name="MT2"><text:time style:data-style-name="N2" text:time-value="10:09:29.945447155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7-01">00/00/0000</text:date><text:s/>- <text:time style:data-style-name="N2" text:time-value="10:09:29.946650562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7-01T10:09:30.372094696</dc:date>
    <meta:print-date>2020-10-05T15:55:44.962000000</meta:print-date>
    <dc:language>pt-PT</dc:language>
    <meta:editing-cycles>711</meta:editing-cycles>
    <meta:editing-duration>PT10H32M43S</meta:editing-duration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