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Mens. 01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40" calcext:value-type="float">
            <text:p>44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2-28" calcext:value-type="date">
            <text:p>28/02/2026</text:p>
          </table:table-cell>
          <table:table-cell table:style-name="ce57" office:value-type="string" calcext:value-type="string">
            <text:p>Mens. 02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40" calcext:value-type="float">
            <text:p>44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3-31" calcext:value-type="date">
            <text:p>31/03/2026</text:p>
          </table:table-cell>
          <table:table-cell table:style-name="ce57" office:value-type="string" calcext:value-type="string">
            <text:p>Mens. 03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40" calcext:value-type="float">
            <text:p>440,00</text:p>
          </table:table-cell>
          <table:table-cell table:style-name="ce53" office:value-type="date" office:date-value="2026-04-16" calcext:value-type="date">
            <text:p>16/04/2026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4-30" calcext:value-type="date">
            <text:p>30/04/2026</text:p>
          </table:table-cell>
          <table:table-cell table:style-name="ce57" office:value-type="string" calcext:value-type="string">
            <text:p>Mens. 04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1]-[.F11]" office:value-type="float" office:value="440" calcext:value-type="float">
            <text:p>44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1])" office:value-type="float" office:value="440" calcext:value-type="float">
            <text:p>44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4.0491589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4.050267887">00:00:00</text:time></text:span><text:span text:style-name="MT2"><text:time style:data-style-name="N2" text:time-value="15:57:54.050291305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4-30">00/00/0000</text:date><text:s/>- <text:time style:data-style-name="N2" text:time-value="15:57:54.05140972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4-30T15:57:54.371523308</dc:date>
    <meta:print-date>2020-10-05T15:55:44.962000000</meta:print-date>
    <dc:language>pt-PT</dc:language>
    <meta:editing-cycles>709</meta:editing-cycles>
    <meta:editing-duration>PT10H32M43S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