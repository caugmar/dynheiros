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2-06" calcext:value-type="date">
            <text:p>06/02/2026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4-08" calcext:value-type="date">
            <text:p>08/04/2026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5-12" calcext:value-type="date">
            <text:p>12/05/2026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6-10" calcext:value-type="date">
            <text:p>10/06/2026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2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1:48.4760602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1:48.48001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6T09:42:21.223639100</dc:date>
    <meta:print-date>2025-05-08T10:23:24.397000000</meta:print-date>
    <dc:language>pt-PT</dc:language>
    <meta:editing-cycles>701</meta:editing-cycles>
    <meta:editing-duration>PT21H16M18S</meta:editing-duration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