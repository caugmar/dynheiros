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46" office:value-type="string" calcext:value-type="string">
            <text:p>Mens. 10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1-19" calcext:value-type="date">
            <text:p>19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46" office:value-type="string" calcext:value-type="string">
            <text:p>Mens. 1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2-22" calcext:value-type="date">
            <text:p>22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46" office:value-type="string" calcext:value-type="string">
            <text:p>Mens. 1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1-26" calcext:value-type="date">
            <text:p>26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46" office:value-type="string" calcext:value-type="string">
            <text:p>Mens. 01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3-04" calcext:value-type="date">
            <text:p>04/03/2026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46" office:value-type="string" calcext:value-type="string">
            <text:p>Mens. 02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3-04" calcext:value-type="date">
            <text:p>04/03/2026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46" office:value-type="string" calcext:value-type="string">
            <text:p>Mens. 03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5-19" calcext:value-type="date">
            <text:p>19/05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46" office:value-type="string" calcext:value-type="string">
            <text:p>Mens. 04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5-19" calcext:value-type="date">
            <text:p>19/05/2026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46" office:value-type="string" calcext:value-type="string">
            <text:p>Mens. 05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2]-[.F1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6-30" calcext:value-type="date">
            <text:p>30/06/2026</text:p>
          </table:table-cell>
          <table:table-cell table:style-name="ce46" office:value-type="string" calcext:value-type="string">
            <text:p>Mens. 06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3]-[.F13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3])" office:value-type="float" office:value="700" calcext:value-type="float">
            <text:p>7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1.977658851">00:00:00</text:time></text:span><text:span text:style-name="MT2"><text:time style:data-style-name="N2" text:time-value="10:09:31.977683327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1.9804883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7-01T10:09:32.345833263</dc:date>
    <dc:language>pt-PT</dc:language>
    <meta:editing-cycles>598</meta:editing-cycles>
    <meta:editing-duration>PT15H45M39S</meta:editing-duration>
    <meta:print-date>2025-09-02T10:23:33.635789082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