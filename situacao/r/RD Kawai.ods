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Mens. 09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46" office:value-type="string" calcext:value-type="string">
            <text:p>Mens. 10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1-19" calcext:value-type="date">
            <text:p>19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46" office:value-type="string" calcext:value-type="string">
            <text:p>Mens. 1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2-22" calcext:value-type="date">
            <text:p>22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46" office:value-type="string" calcext:value-type="string">
            <text:p>Mens. 1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1-26" calcext:value-type="date">
            <text:p>26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46" office:value-type="string" calcext:value-type="string">
            <text:p>Mens. 01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3-04" calcext:value-type="date">
            <text:p>04/03/2026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46" office:value-type="string" calcext:value-type="string">
            <text:p>Mens. 02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3-04" calcext:value-type="date">
            <text:p>04/03/2026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3-31" calcext:value-type="date">
            <text:p>31/03/2026</text:p>
          </table:table-cell>
          <table:table-cell table:style-name="ce46" office:value-type="string" calcext:value-type="string">
            <text:p>Mens. 03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0]-[.F10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0])" office:value-type="float" office:value="350" calcext:value-type="float">
            <text:p>35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7:14.170497295">00:00:00</text:time></text:span><text:span text:style-name="MT2"><text:time style:data-style-name="N2" text:time-value="14:27:14.170523255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7:14.1738638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02T14:27:14.534853400</dc:date>
    <dc:language>pt-PT</dc:language>
    <meta:editing-cycles>594</meta:editing-cycles>
    <meta:editing-duration>PT15H44M57S</meta:editing-duration>
    <meta:print-date>2025-09-02T10:23:33.635789082</meta:print-date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