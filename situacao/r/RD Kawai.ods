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46" office:value-type="string" calcext:value-type="string">
            <text:p>Mens. 02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46" office:value-type="string" calcext:value-type="string">
            <text:p>Mens. 03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0]-[.F10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46" office:value-type="string" calcext:value-type="string">
            <text:p>Mens. 04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1]-[.F11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1])" office:value-type="float" office:value="700" calcext:value-type="float">
            <text:p>7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5.892203178">00:00:00</text:time></text:span><text:span text:style-name="MT2"><text:time style:data-style-name="N2" text:time-value="15:57:55.892227286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5.8950440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56.258751294</dc:date>
    <dc:language>pt-PT</dc:language>
    <meta:editing-cycles>595</meta:editing-cycles>
    <meta:editing-duration>PT15H44M57S</meta:editing-duration>
    <meta:print-date>2025-09-02T10:23:33.635789082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