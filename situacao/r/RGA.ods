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9]-[.F9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0]-[.F10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1]-[.F11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1])" office:value-type="float" office:value="600" calcext:value-type="float">
            <text:p>60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6.567655744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6.5699450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56.898933115</dc:date>
    <dc:language>pt-PT</dc:language>
    <meta:editing-cycles>583</meta:editing-cycles>
    <meta:editing-duration>PT16H40M52S</meta:editing-duration>
    <meta:print-date>2025-09-02T14:39:51.969309330</meta:print-date>
    <meta:document-statistic meta:table-count="1" meta:cell-count="76" meta:object-count="0"/>
    <meta:user-defined meta:name="Info 0"/>
    <meta:user-defined meta:name="Info 1"/>
    <meta:user-defined meta:name="Info 2"/>
    <meta:user-defined meta:name="Info 3"/>
  </office:meta>
</office:document-meta>
</file>