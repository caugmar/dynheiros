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9]-[.F9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Mens. 03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0]-[.F10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1]-[.F11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Mens. 05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2]-[.F12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6-30" calcext:value-type="date">
            <text:p>30/06/2026</text:p>
          </table:table-cell>
          <table:table-cell table:style-name="ce33" office:value-type="string" calcext:value-type="string">
            <text:p>Mens. 06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3]-[.F13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3])" office:value-type="float" office:value="900" calcext:value-type="float">
            <text:p>90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2.675398557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2.6777750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7-01T10:09:33.053782438</dc:date>
    <dc:language>pt-PT</dc:language>
    <meta:editing-cycles>585</meta:editing-cycles>
    <meta:editing-duration>PT16H40M52S</meta:editing-duration>
    <meta:print-date>2025-09-02T14:39:51.969309330</meta:print-date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