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6-01-29" calcext:value-type="date">
            <text:p>29/01/2026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6-01-29" calcext:value-type="date">
            <text:p>29/01/2026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8]-[.F8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9]-[.F9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Mens. 03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0]-[.F10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10])" office:value-type="float" office:value="450" calcext:value-type="float">
            <text:p>45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14.944230820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14.9476131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02T14:27:15.308918571</dc:date>
    <dc:language>pt-PT</dc:language>
    <meta:editing-cycles>582</meta:editing-cycles>
    <meta:editing-duration>PT16H40M52S</meta:editing-duration>
    <meta:print-date>2025-09-02T14:39:51.969309330</meta:print-date>
    <meta:document-statistic meta:table-count="1" meta:cell-count="70" meta:object-count="0"/>
    <meta:user-defined meta:name="Info 0"/>
    <meta:user-defined meta:name="Info 1"/>
    <meta:user-defined meta:name="Info 2"/>
    <meta:user-defined meta:name="Info 3"/>
  </office:meta>
</office:document-meta>
</file>