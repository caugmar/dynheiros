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1]-[.F11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2]-[.F12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2])" office:value-type="float" office:value="750" calcext:value-type="float">
            <text:p>7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54.865072249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54.8673609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6-01T10:21:55.246458101</dc:date>
    <dc:language>pt-PT</dc:language>
    <meta:editing-cycles>584</meta:editing-cycles>
    <meta:editing-duration>PT16H40M52S</meta:editing-duration>
    <meta:print-date>2025-09-02T14:39:51.969309330</meta:print-date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