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2-02" calcext:value-type="date">
            <text:p>02/02/2026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3-09" calcext:value-type="date">
            <text:p>09/03/2026</text:p>
          </table:table-cell>
          <table:table-cell table:style-name="ce44" table:formula="of:=[.C9]-[.F9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0]-[.F10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1]-[.F11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2]-[.F12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2])" office:value-type="float" office:value="2070" calcext:value-type="float">
            <text:p>2.07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7.197716187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7.1998231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30T15:57:57.554688282</dc:date>
    <dc:language>pt-PT</dc:language>
    <meta:editing-cycles>686</meta:editing-cycles>
    <meta:editing-duration>PT17H53M29S</meta:editing-duration>
    <meta:print-date>2022-11-01T14:15:55.225636878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