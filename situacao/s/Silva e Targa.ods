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2-16" calcext:value-type="date">
            <text:p>16/12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2-16" calcext:value-type="date">
            <text:p>16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6-02-09" calcext:value-type="date">
            <text:p>09/02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Mens. 01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29" office:value-type="date" office:date-value="2026-02-09" calcext:value-type="date">
            <text:p>09/02/2026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Mens. 02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29" office:value-type="date" office:date-value="2026-04-06" calcext:value-type="date">
            <text:p>06/04/2026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Mens. 03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29" office:value-type="date" office:date-value="2026-04-06" calcext:value-type="date">
            <text:p>06/04/2026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Mens. 04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1]-[.F11]" office:value-type="float" office:value="360" calcext:value-type="float">
            <text:p>36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Mens. 05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2]-[.F12]" office:value-type="float" office:value="360" calcext:value-type="float">
            <text:p>36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2])" office:value-type="float" office:value="720" calcext:value-type="float">
            <text:p>72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56.776887946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6-01">00/00/0000</text:date></text:span><text:span text:style-name="MT6"><text:s/>- </text:span><text:span text:style-name="MT6"><text:time style:data-style-name="N2" text:time-value="10:21:56.778420459">00:00:00</text:time></text:span><text:span text:style-name="MT6"><text:s/></text:span></text:p>
        </style:region-center>
        <style:region-right>
          <text:p><text:span text:style-name="MT3">Silva e Targa Restaurante Ltda.</text:span></text:p>
          <text:p><text:span text:style-name="MT6">(15) 3241-2145</text:span></text:p>
          <text:p><text:span text:style-name="MT6">E-mail: leiliane.odonto@hot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ilva e Targa Restaurante Ltda.</text:span></text:p>
          <text:p><text:span text:style-name="MT9">(15) 3241-2145 - leiliane.odonto@hotmail.com</text:span><text:span text:style-name="MT10"> - Página </text:span><text:span text:style-name="MT10"><text:page-number>1</text:page-number></text:span><text:span text:style-name="MT10"><text:s/>de </text:span><text:span text:style-name="MT10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56.7824532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6-01T10:21:57.120153706</dc:date>
    <dc:language>pt-PT</dc:language>
    <meta:editing-cycles>662</meta:editing-cycles>
    <meta:editing-duration>P3DT14H41M16S</meta:editing-duration>
    <meta:print-date>2022-12-01T16:36:33.088000000</meta:print-date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