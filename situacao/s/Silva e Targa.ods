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4-06" calcext:value-type="date">
            <text:p>06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1]-[.F11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2]-[.F12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Mens. 06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3]-[.F13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3])" office:value-type="float" office:value="1080" calcext:value-type="float">
            <text:p>1.08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4.724956646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7-01">00/00/0000</text:date></text:span><text:span text:style-name="MT6"><text:s/>- </text:span><text:span text:style-name="MT6"><text:time style:data-style-name="N2" text:time-value="10:09:34.726452710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4.7302975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9:35.090355065</dc:date>
    <dc:language>pt-PT</dc:language>
    <meta:editing-cycles>663</meta:editing-cycles>
    <meta:editing-duration>P3DT14H41M16S</meta:editing-duration>
    <meta:print-date>2022-12-01T16:36:33.088000000</meta:print-date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