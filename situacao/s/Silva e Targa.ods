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0])" office:value-type="float" office:value="0" calcext:value-type="float">
            <text:p>-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31:46.6693781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10">00/00/0000</text:date></text:span><text:span text:style-name="MT6"><text:s/>- </text:span><text:span text:style-name="MT6"><text:time style:data-style-name="N2" text:time-value="16:31:46.678789200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31:46.685334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9:29</meta:creation-date>
    <dc:date>2026-04-10T16:37:14.431668000</dc:date>
    <dc:language>pt-PT</dc:language>
    <meta:editing-cycles>660</meta:editing-cycles>
    <meta:editing-duration>P3DT14H41M16S</meta:editing-duration>
    <meta:print-date>2022-12-01T16:36:33.088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