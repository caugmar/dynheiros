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65 - mens. 01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9 - mens. 02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3-09" calcext:value-type="date">
            <text:p>09/03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93 - mens. 03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4-10" calcext:value-type="date">
            <text:p>10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13407 - mens. 04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5-08" calcext:value-type="date">
            <text:p>08/05/2026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NF 13421 - mens. 05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6-10" calcext:value-type="date">
            <text:p>10/06/2026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NF 13435 - mens. 06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3]-[.F13]" office:value-type="float" office:value="520" calcext:value-type="float">
            <text:p>5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520" calcext:value-type="float">
            <text:p>52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6.014063922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7-01">00/00/0000</text:date></text:span><text:span text:style-name="MT6"><text:s/>- </text:span><text:span text:style-name="MT6"><text:time style:data-style-name="N2" text:time-value="10:09:36.015340885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6.018737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36.415007318</dc:date>
    <dc:language>pt-PT</dc:language>
    <meta:editing-cycles>707</meta:editing-cycles>
    <meta:editing-duration>PT21H17M16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