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9 - mens. 02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3-09" calcext:value-type="date">
            <text:p>09/03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93 - mens. 03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4-10" calcext:value-type="date">
            <text:p>10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0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58:13.9330721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11">00/00/0000</text:date></text:span><text:span text:style-name="MT6"><text:s/>- </text:span><text:span text:style-name="MT6"><text:time style:data-style-name="N2" text:time-value="10:58:13.9380349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58:13.94657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1T10:58:51.547883400</dc:date>
    <dc:language>pt-PT</dc:language>
    <meta:editing-cycles>702</meta:editing-cycles>
    <meta:editing-duration>PT21H14M17S</meta:editing-duration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