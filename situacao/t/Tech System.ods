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6-01-09" calcext:value-type="date">
            <text:p>09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65 - mens. 01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9 - mens. 02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3-09" calcext:value-type="date">
            <text:p>09/03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93 - mens. 03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4-10" calcext:value-type="date">
            <text:p>10/04/2026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13407 - mens. 04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5-08" calcext:value-type="date">
            <text:p>08/05/2026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NF 13421 - mens. 05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6-10" calcext:value-type="date">
            <text:p>10/06/2026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22:17.9675101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6-12">00/00/0000</text:date></text:span><text:span text:style-name="MT6"><text:s/>- </text:span><text:span text:style-name="MT6"><text:time style:data-style-name="N2" text:time-value="16:22:17.9696818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22:17.97617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4:02</meta:creation-date>
    <dc:date>2026-06-12T16:24:59.698380100</dc:date>
    <dc:language>pt-PT</dc:language>
    <meta:editing-cycles>706</meta:editing-cycles>
    <meta:editing-duration>PT21H17M16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