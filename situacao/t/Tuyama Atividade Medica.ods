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]-[.F2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]-[.F3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9" office:value-type="string" calcext:value-type="string">
            <text:p>Mens. 02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9" office:value-type="string" calcext:value-type="string">
            <text:p>Mens. 03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4-30" calcext:value-type="date">
            <text:p>30/04/2026</text:p>
          </table:table-cell>
          <table:table-cell table:style-name="ce49" office:value-type="string" calcext:value-type="string">
            <text:p>Mens. 04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5-31" calcext:value-type="date">
            <text:p>31/05/2026</text:p>
          </table:table-cell>
          <table:table-cell table:style-name="ce49" office:value-type="string" calcext:value-type="string">
            <text:p>Mens. 05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6-30" calcext:value-type="date">
            <text:p>30/06/2026</text:p>
          </table:table-cell>
          <table:table-cell table:style-name="ce49" office:value-type="string" calcext:value-type="string">
            <text:p>Mens. 06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2])" office:value-type="float" office:value="2850" calcext:value-type="float">
            <text:p>2.85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36.721498901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36.7235833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7-01T10:09:37.123054890</dc:date>
    <dc:language>pt-PT</dc:language>
    <meta:editing-cycles>584</meta:editing-cycles>
    <meta:editing-duration>P1DT7H34M49S</meta:editing-duration>
    <meta:document-statistic meta:table-count="1" meta:cell-count="136" meta:object-count="0"/>
    <meta:user-defined meta:name="Info 0"/>
    <meta:user-defined meta:name="Info 1"/>
    <meta:user-defined meta:name="Info 2"/>
    <meta:user-defined meta:name="Info 3"/>
  </office:meta>
</office:document-meta>
</file>