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]-[.F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]-[.F3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9" office:value-type="string" calcext:value-type="string">
            <text:p>Mens. 03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4-30" calcext:value-type="date">
            <text:p>30/04/2026</text:p>
          </table:table-cell>
          <table:table-cell table:style-name="ce49" office:value-type="string" calcext:value-type="string">
            <text:p>Mens. 04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5-31" calcext:value-type="date">
            <text:p>31/05/2026</text:p>
          </table:table-cell>
          <table:table-cell table:style-name="ce49" office:value-type="string" calcext:value-type="string">
            <text:p>Mens. 05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1])" office:value-type="float" office:value="2750" calcext:value-type="float">
            <text:p>2.75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6:20:10.563593623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6:20:10.5659949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6-01T16:20:37.645449615</dc:date>
    <dc:language>pt-PT</dc:language>
    <meta:editing-cycles>583</meta:editing-cycles>
    <meta:editing-duration>P1DT7H34M49S</meta:editing-duration>
    <meta:document-statistic meta:table-count="1" meta:cell-count="130" meta:object-count="0"/>
    <meta:user-defined meta:name="Info 0"/>
    <meta:user-defined meta:name="Info 1"/>
    <meta:user-defined meta:name="Info 2"/>
    <meta:user-defined meta:name="Info 3"/>
  </office:meta>
</office:document-meta>
</file>