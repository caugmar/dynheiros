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NF 6467 - process. 01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2-10" calcext:value-type="date">
            <text:p>10/02/2026</text:p>
          </table:table-cell>
          <table:table-cell table:style-name="ce62" table:formula="of:=[.C8]-[.F8]" office:value-type="float" office:value="20" calcext:value-type="float">
            <text:p>2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NF 6476 - process. 02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70" calcext:value-type="float">
            <text:p>570,00</text:p>
          </table:table-cell>
          <table:table-cell table:style-name="ce50" office:value-type="date" office:date-value="2026-03-10" calcext:value-type="date">
            <text:p>10/03/2026</text:p>
          </table:table-cell>
          <table:table-cell table:style-name="ce62" table:formula="of:=[.C9]-[.F9]" office:value-type="float" office:value="-20" calcext:value-type="float">
            <text:p>(20,00)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NF 6485 - process. 03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50" calcext:value-type="float">
            <text:p>55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0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5:59.95779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5:59.9597900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10">00/00/0000</text:date><text:s/>- <text:time style:data-style-name="N2" text:time-value="16:55:59.9650193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00-10-16T13:00:00</meta:creation-date>
    <dc:date>2026-04-10T16:56:48.091274300</dc:date>
    <meta:print-date>2020-01-06T16:38:44.221000000</meta:print-date>
    <dc:language>pt-PT</dc:language>
    <meta:editing-cycles>544</meta:editing-cycles>
    <meta:editing-duration>PT6H27M58S</meta:editing-duration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