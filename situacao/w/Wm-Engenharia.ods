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3-31" calcext:value-type="date">
            <text:p>31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5-25" calcext:value-type="date">
            <text:p>25/05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Mens. 04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5-25" calcext:value-type="date">
            <text:p>25/05/2026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5-31" calcext:value-type="date">
            <text:p>31/05/2026</text:p>
          </table:table-cell>
          <table:table-cell table:style-name="ce57" office:value-type="string" calcext:value-type="string">
            <text:p>Mens. 05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2]-[.F12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2])" office:value-type="float" office:value="270" calcext:value-type="float">
            <text:p>27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27:17.151106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27:17.153046700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6-01">00/00/0000</text:date><text:s/>- <text:time style:data-style-name="N2" text:time-value="11:27:17.1579587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00-10-16T12:57:25</meta:creation-date>
    <dc:date>2026-06-01T11:28:01.956048900</dc:date>
    <meta:print-date>2020-10-05T15:55:44.962000000</meta:print-date>
    <dc:language>pt-PT</dc:language>
    <meta:editing-cycles>683</meta:editing-cycles>
    <meta:editing-duration>PT9H27M8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