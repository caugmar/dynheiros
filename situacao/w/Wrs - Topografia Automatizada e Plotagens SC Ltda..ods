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2-11" calcext:value-type="date">
            <text:p>11/02/2026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Mens. 03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4-15" calcext:value-type="date">
            <text:p>15/04/2026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Mens. 04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5-22" calcext:value-type="date">
            <text:p>22/05/2026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6" office:value-type="string" calcext:value-type="string">
            <text:p>Mens. 05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6-12" calcext:value-type="date">
            <text:p>12/06/2026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2])" office:value-type="float" office:value="0" calcext:value-type="float">
            <text:p>-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59:24.859392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59:24.861262700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6-16">00/00/0000</text:date><text:s/>- <text:time style:data-style-name="N2" text:time-value="09:59:24.866451200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6-16">00/00/0000</text:date></text:span><text:span text:style-name="MT6"><text:s/>- </text:span><text:span text:style-name="MT6"><text:time style:data-style-name="N2" text:time-value="09:59:24.867466900">00:00:00</text:time></text:span><text:span text:style-name="MT6"><text:time style:data-style-name="N2" text:time-value="09:59:24.867507500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00-10-16T12:57:25</meta:creation-date>
    <dc:date>2026-06-16T09:59:52.238761800</dc:date>
    <meta:print-date>2025-09-02T10:23:28.923814844</meta:print-date>
    <dc:language>pt-PT</dc:language>
    <meta:editing-cycles>695</meta:editing-cycles>
    <meta:editing-duration>PT9H22M3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