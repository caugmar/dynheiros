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2-11" calcext:value-type="date">
            <text:p>11/02/2026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4-15" calcext:value-type="date">
            <text:p>15/04/2026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Mens. 04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5-22" calcext:value-type="date">
            <text:p>22/05/2026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6" office:value-type="string" calcext:value-type="string">
            <text:p>Mens. 05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6-12" calcext:value-type="date">
            <text:p>12/06/2026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6" office:value-type="string" calcext:value-type="string">
            <text:p>Mens. 06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3]-[.F13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3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8.7501004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8.751322650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7-01">00/00/0000</text:date><text:s/>- <text:time style:data-style-name="N2" text:time-value="10:09:38.752797320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7-01">00/00/0000</text:date></text:span><text:span text:style-name="MT6"><text:s/>- </text:span><text:span text:style-name="MT6"><text:time style:data-style-name="N2" text:time-value="10:09:38.753503945">00:00:00</text:time></text:span><text:span text:style-name="MT6"><text:time style:data-style-name="N2" text:time-value="10:09:38.753541425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7-01T10:09:39.139922131</dc:date>
    <meta:print-date>2025-09-02T10:23:28.923814844</meta:print-date>
    <dc:language>pt-PT</dc:language>
    <meta:editing-cycles>696</meta:editing-cycles>
    <meta:editing-duration>PT9H22M3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