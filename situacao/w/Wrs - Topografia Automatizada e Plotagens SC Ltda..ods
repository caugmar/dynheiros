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2-11" calcext:value-type="date">
            <text:p>11/02/2026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3-09" calcext:value-type="date">
            <text:p>09/03/2026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3-31" calcext:value-type="date">
            <text:p>31/03/2026</text:p>
          </table:table-cell>
          <table:table-cell table:style-name="ce56" office:value-type="string" calcext:value-type="string">
            <text:p>Mens. 03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0]-[.F10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0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20.4517879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20.453435428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4-02">00/00/0000</text:date><text:s/>- <text:time style:data-style-name="N2" text:time-value="14:27:20.455756183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4-02">00/00/0000</text:date></text:span><text:span text:style-name="MT6"><text:s/>- </text:span><text:span text:style-name="MT6"><text:time style:data-style-name="N2" text:time-value="14:27:20.456887782">00:00:00</text:time></text:span><text:span text:style-name="MT6"><text:time style:data-style-name="N2" text:time-value="14:27:20.456927412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4-02T14:27:20.890055106</dc:date>
    <meta:print-date>2025-09-02T10:23:28.923814844</meta:print-date>
    <dc:language>pt-PT</dc:language>
    <meta:editing-cycles>690</meta:editing-cycles>
    <meta:editing-duration>PT9H20M40S</meta:editing-duration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